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ystem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font-pitch="variable" style:name="Nimbus Sans" svg:font-family="'Nimbus Sans'"/>
    <style:font-face style:font-family-generic="system" style:font-pitch="variable" style:name="Noto Sans Arabic" svg:font-family="'Noto Sans Arabic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1.4043in"/>
    </style:style>
    <style:style style:family="table-column" style:name="co3">
      <style:table-column-properties fo:break-before="auto" style:column-width="1.5547in"/>
    </style:style>
    <style:style style:family="table-column" style:name="co4">
      <style:table-column-properties fo:break-before="auto" style:column-width="1.1256in"/>
    </style:style>
    <style:style style:family="table-column" style:name="co12">
      <style:table-column-properties fo:break-before="auto" style:column-width="0.9972in"/>
    </style:style>
    <style:style style:family="table-column" style:name="co13">
      <style:table-column-properties fo:break-before="auto" style:column-width="1.4154in"/>
    </style:style>
    <style:style style:family="table-column" style:name="co14">
      <style:table-column-properties fo:break-before="auto" style:column-width="3.0984in"/>
    </style:style>
    <style:style style:family="table-column" style:name="co8">
      <style:table-column-properties fo:break-before="auto" style:column-width="1.1575in"/>
    </style:style>
    <style:style style:family="table-column" style:name="co9">
      <style:table-column-properties fo:break-before="auto" style:column-width="1.1689in"/>
    </style:style>
    <style:style style:family="table-column" style:name="co10">
      <style:table-column-properties fo:break-before="auto" style:column-width="1.1362in"/>
    </style:style>
    <style:style style:family="table-column" style:name="co11">
      <style:table-column-properties fo:break-before="auto" style:column-width="1.5118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family="table-cell" style:name="ce5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7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Liberation Serif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data-style-name="N63" style:family="table-cell" style:name="ce12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13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family="table-cell" style:name="ce14" style:parent-style-name="Default">
      <style:table-cell-properties fo:wrap-option="no-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family="table-cell" style:name="ce8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9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Liberation Serif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data-style-name="N63" style:family="table-cell" style:name="ce10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11" style:parent-style-name="Default">
      <style:table-cell-properties fo:wrap-option="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  <style:style style:family="table-cell" style:name="ce15" style:parent-style-name="Default">
      <style:table-cell-properties fo:wrap-option="no-wrap" style:repeat-content="false" style:text-align-source="fix"/>
      <style:paragraph-properties fo:margin-left="0in" fo:text-align="center"/>
      <style:text-properties fo:country="US" fo:font-size="10pt" fo:font-style="normal" fo:font-weight="normal" fo:language="en" fo:text-shadow="none" style:country-asian="CN" style:country-complex="IN" style:font-name="Nimbus Sans" style:font-name-asian="DejaVu Sans" style:font-name-complex="Noto Sans Arabic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ADMIN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TEACHER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 table:style-name="ro1">
          <table:table-cell calcext:value-type="string" office:value-type="string">
            <text:p>1</text:p>
          </table:table-cell>
          <table:table-cell calcext:value-type="string" office:value-type="string">
            <text:p>4</text:p>
          </table:table-cell>
          <table:table-cell calcext:value-type="string" office:value-type="string">
            <text:p>3</text:p>
          </table:table-cell>
        </table:table-row>
        <table:table-row table:style-name="ro1">
          <table:table-cell calcext:value-type="string" office:value-type="string">
            <text:p>2</text:p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3</text:p>
          </table:table-cell>
        </table:table-row>
        <table:table-row table:style-name="ro1">
          <table:table-cell calcext:value-type="string" office:value-type="string">
            <text:p>3</text:p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3" office:value-type="string">
            <text:p>3</text:p>
          </table:table-cell>
        </table:table-row>
      </table:table>
      <table:table table:name="AcademicProgram" table:style-name="ta1">
        <table:table-column table:default-cell-style-name="ce8" table:style-name="co2"/>
        <table:table-column table:default-cell-style-name="ce8" table:style-name="co3"/>
        <table:table-column table:default-cell-style-name="ce8" table:style-name="co4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Ingenieria de Sistemas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Ingenieria de Software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Ingenieria Civil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>
            <text:p>Ingenieria de Alimentos</text:p>
          </table:table-cell>
          <table:table-cell calcext:value-type="float" office:value="10" office:value-type="float">
            <text:p>10</text:p>
          </table:table-cell>
        </table:table-row>
      </table:table>
      <table:table table:name="SemesterTemplate" table:style-name="ta1">
        <table:table-column table:default-cell-style-name="ce8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</table:table-row>
        <table:table-row table:style-name="ro1">
          <table:table-cell calcext:value-type="float" office:value="2" office:value-type="float" table:number-columns-repeated="3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2" office:value-type="float">
            <text:p>2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2" office:value-type="float">
            <text:p>2</text:p>
          </table:table-cell>
          <table:table-cell calcext:value-type="float" office:value="4" office:value-type="float">
            <text:p>4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" office:value-type="float" table:number-columns-repeated="2">
            <text:p>1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1" office:value-type="float">
            <text:p>1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1" office:value-type="float">
            <text:p>1</text:p>
          </table:table-cell>
          <table:table-cell calcext:value-type="float" office:value="4" office:value-type="float">
            <text:p>4</text:p>
          </table:table-cell>
        </table:table-row>
      </table:table>
      <table:table table:name="SemesterTemplateDetails" table:style-name="ta1">
        <table:table-column table:default-cell-style-name="ce8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 table:style-name="ro1">
          <table:table-cell calcext:value-type="float" office:value="1" office:value-type="float" table:number-columns-repeated="3">
            <text:p>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1" office:value-type="float">
            <text:p>1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1" office:value-type="float">
            <text:p>1</text:p>
          </table:table-cell>
          <table:table-cell calcext:value-type="float" office:value="4" office:value-type="float">
            <text:p>4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" office:value-type="float">
            <text:p>1</text:p>
          </table:table-cell>
          <table:table-cell calcext:value-type="float" office:value="5" office:value-type="float">
            <text:p>5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2" office:value-type="float">
            <text:p>2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  <table:table-cell calcext:value-type="float" office:value="7" office:value-type="float">
            <text:p>7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2" office:value-type="float">
            <text:p>2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2" office:value-type="float">
            <text:p>2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2" office:value-type="float">
            <text:p>2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3" office:value-type="float">
            <text:p>3</text:p>
          </table:table-cell>
          <table:table-cell calcext:value-type="float" office:value="11" office:value-type="float">
            <text:p>11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3" office:value-type="float">
            <text:p>3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3" office:value-type="float">
            <text:p>3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float" office:value="3" office:value-type="float">
            <text:p>3</text:p>
          </table:table-cell>
          <table:table-cell calcext:value-type="float" office:value="14" office:value-type="float">
            <text:p>14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float" office:value="3" office:value-type="float">
            <text:p>3</text:p>
          </table:table-cell>
          <table:table-cell calcext:value-type="float" office:value="15" office:value-type="float">
            <text:p>15</text:p>
          </table:table-cell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float" office:value="4" office:value-type="float">
            <text:p>4</text:p>
          </table:table-cell>
          <table:table-cell calcext:value-type="float" office:value="16" office:value-type="float">
            <text:p>16</text:p>
          </table:table-cell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float" office:value="4" office:value-type="float">
            <text:p>4</text:p>
          </table:table-cell>
          <table:table-cell calcext:value-type="float" office:value="17" office:value-type="float">
            <text:p>17</text:p>
          </table:table-cell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float" office:value="4" office:value-type="float">
            <text:p>4</text:p>
          </table:table-cell>
          <table:table-cell calcext:value-type="float" office:value="18" office:value-type="float">
            <text:p>18</text:p>
          </table:table-cell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float" office:value="4" office:value-type="float">
            <text:p>4</text:p>
          </table:table-cell>
          <table:table-cell calcext:value-type="float" office:value="19" office:value-type="float">
            <text:p>19</text:p>
          </table:table-cell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float" office:value="4" office:value-type="float">
            <text:p>4</text:p>
          </table:table-cell>
          <table:table-cell calcext:value-type="float" office:value="20" office:value-type="float">
            <text:p>20</text:p>
          </table:table-cell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5" office:value-type="float">
            <text:p>5</text:p>
          </table:table-cell>
          <table:table-cell calcext:value-type="float" office:value="21" office:value-type="float">
            <text:p>21</text:p>
          </table:table-cell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5" office:value-type="float">
            <text:p>5</text:p>
          </table:table-cell>
          <table:table-cell calcext:value-type="float" office:value="22" office:value-type="float">
            <text:p>22</text:p>
          </table:table-cell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5" office:value-type="float">
            <text:p>5</text:p>
          </table:table-cell>
          <table:table-cell calcext:value-type="float" office:value="23" office:value-type="float">
            <text:p>23</text:p>
          </table:table-cell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5" office:value-type="float">
            <text:p>5</text:p>
          </table:table-cell>
          <table:table-cell calcext:value-type="float" office:value="24" office:value-type="float">
            <text:p>24</text:p>
          </table:table-cell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5" office:value-type="float">
            <text:p>5</text:p>
          </table:table-cell>
          <table:table-cell calcext:value-type="float" office:value="25" office:value-type="float">
            <text:p>25</text:p>
          </table:table-cell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6" office:value-type="float">
            <text:p>6</text:p>
          </table:table-cell>
          <table:table-cell calcext:value-type="float" office:value="26" office:value-type="float">
            <text:p>26</text:p>
          </table:table-cell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6" office:value-type="float">
            <text:p>6</text:p>
          </table:table-cell>
          <table:table-cell calcext:value-type="float" office:value="27" office:value-type="float">
            <text:p>27</text:p>
          </table:table-cell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6" office:value-type="float">
            <text:p>6</text:p>
          </table:table-cell>
          <table:table-cell calcext:value-type="float" office:value="28" office:value-type="float">
            <text:p>28</text:p>
          </table:table-cell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6" office:value-type="float">
            <text:p>6</text:p>
          </table:table-cell>
          <table:table-cell calcext:value-type="float" office:value="29" office:value-type="float">
            <text:p>29</text:p>
          </table:table-cell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6" office:value-type="float">
            <text:p>6</text:p>
          </table:table-cell>
          <table:table-cell calcext:value-type="float" office:value="30" office:value-type="float">
            <text:p>30</text:p>
          </table:table-cell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7" office:value-type="float">
            <text:p>7</text:p>
          </table:table-cell>
          <table:table-cell calcext:value-type="float" office:value="31" office:value-type="float">
            <text:p>31</text:p>
          </table:table-cell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7" office:value-type="float">
            <text:p>7</text:p>
          </table:table-cell>
          <table:table-cell calcext:value-type="float" office:value="32" office:value-type="float">
            <text:p>32</text:p>
          </table:table-cell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7" office:value-type="float">
            <text:p>7</text:p>
          </table:table-cell>
          <table:table-cell calcext:value-type="float" office:value="33" office:value-type="float">
            <text:p>33</text:p>
          </table:table-cell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7" office:value-type="float">
            <text:p>7</text:p>
          </table:table-cell>
          <table:table-cell calcext:value-type="float" office:value="34" office:value-type="float">
            <text:p>34</text:p>
          </table:table-cell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7" office:value-type="float">
            <text:p>7</text:p>
          </table:table-cell>
          <table:table-cell calcext:value-type="float" office:value="35" office:value-type="float">
            <text:p>35</text:p>
          </table:table-cell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8" office:value-type="float">
            <text:p>8</text:p>
          </table:table-cell>
          <table:table-cell calcext:value-type="float" office:value="36" office:value-type="float">
            <text:p>36</text:p>
          </table:table-cell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8" office:value-type="float">
            <text:p>8</text:p>
          </table:table-cell>
          <table:table-cell calcext:value-type="float" office:value="37" office:value-type="float">
            <text:p>37</text:p>
          </table:table-cell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8" office:value-type="float">
            <text:p>8</text:p>
          </table:table-cell>
          <table:table-cell calcext:value-type="float" office:value="38" office:value-type="float">
            <text:p>38</text:p>
          </table:table-cell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8" office:value-type="float">
            <text:p>8</text:p>
          </table:table-cell>
          <table:table-cell calcext:value-type="float" office:value="39" office:value-type="float">
            <text:p>39</text:p>
          </table:table-cell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8" office:value-type="float">
            <text:p>8</text:p>
          </table:table-cell>
          <table:table-cell calcext:value-type="float" office:value="40" office:value-type="float">
            <text:p>40</text:p>
          </table:table-cell>
        </table:table-row>
      </table:table>
      <table:table table:name="Prerequisite" table:style-name="ta1">
        <table:table-column table:default-cell-style-name="ce8" table:style-name="co1"/>
        <table:table-column table:default-cell-style-name="ce8" table:style-name="co12"/>
        <table:table-column table:default-cell-style-name="ce8" table:style-name="co13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float" office:value="6" office:value-type="float">
            <text:p>6</text:p>
          </table:table-cell>
          <table:table-cell calcext:value-type="float" office:value="1" office:value-type="float">
            <text:p>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11" office:value-type="float">
            <text:p>11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12" office:value-type="float">
            <text:p>12</text:p>
          </table:table-cell>
          <table:table-cell calcext:value-type="float" office:value="6" office:value-type="float">
            <text:p>6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14" office:value-type="float">
            <text:p>14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16" office:value-type="float">
            <text:p>16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17" office:value-type="float">
            <text:p>17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18" office:value-type="float">
            <text:p>18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19" office:value-type="float">
            <text:p>19</text:p>
          </table:table-cell>
          <table:table-cell calcext:value-type="float" office:value="16" office:value-type="float">
            <text:p>16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20" office:value-type="float">
            <text:p>20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21" office:value-type="float">
            <text:p>21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22" office:value-type="float">
            <text:p>22</text:p>
          </table:table-cell>
          <table:table-cell calcext:value-type="float" office:value="21" office:value-type="float">
            <text:p>21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23" office:value-type="float">
            <text:p>23</text:p>
          </table:table-cell>
          <table:table-cell calcext:value-type="float" office:value="2" office:value-type="float">
            <text:p>2</text:p>
          </table:table-cell>
        </table:table-row>
        <table:table-row table:style-name="ro1">
          <table:table-cell calcext:value-type="string" office:value-type="string">
            <text:p>15</text:p>
          </table:table-cell>
          <table:table-cell calcext:value-type="string" office:value-type="string">
            <text:p>26</text:p>
          </table:table-cell>
          <table:table-cell calcext:value-type="string" office:value-type="string">
            <text:p>23</text:p>
          </table:table-cell>
        </table:table-row>
      </table:table>
      <table:table table:name="Course" table:style-name="ta1">
        <table:table-column table:default-cell-style-name="ce8" table:style-name="co1"/>
        <table:table-column table:default-cell-style-name="ce8" table:style-name="co14"/>
        <table:table-column table:default-cell-style-name="ce8" table:number-columns-repeated="2" table:style-name="co1"/>
        <table:table-column table:default-cell-style-name="Default" table:style-name="co2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 calcext:value-type="string" office:value-type="string">
            <text:p>description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FUNDAMENTOS DE PROGRAMACION</text:p>
          </table:table-cell>
          <table:table-cell calcext:value-type="string" office:value-type="string">
            <text:p>FPR1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MATEMATICAS BASICAS</text:p>
          </table:table-cell>
          <table:table-cell calcext:value-type="string" office:value-type="string">
            <text:p>MAT1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LOGICA COMPUTACIONAL</text:p>
          </table:table-cell>
          <table:table-cell calcext:value-type="string" office:value-type="string">
            <text:p>LOG204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>
            <text:p>COMPETENCIAS COMUNICATIVAS</text:p>
          </table:table-cell>
          <table:table-cell calcext:value-type="string" office:value-type="string">
            <text:p>COM102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string" office:value-type="string">
            <text:p>INTRODUCCION A LA INGENIERIA</text:p>
          </table:table-cell>
          <table:table-cell calcext:value-type="string" office:value-type="string">
            <text:p>ING202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string" office:value-type="string">
            <text:p>PROGRAMACION ORIENTADA A OBJETOS</text:p>
          </table:table-cell>
          <table:table-cell calcext:value-type="string" office:value-type="string">
            <text:p>POO2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string" office:value-type="string">
            <text:p>CALCULO I</text:p>
          </table:table-cell>
          <table:table-cell calcext:value-type="string" office:value-type="string">
            <text:p>CAL2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string" office:value-type="string">
            <text:p>ARQUITCTURA DE COMPUTADORES</text:p>
          </table:table-cell>
          <table:table-cell calcext:value-type="string" office:value-type="string">
            <text:p>ARG2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string" office:value-type="string">
            <text:p>INGLES I</text:p>
          </table:table-cell>
          <table:table-cell calcext:value-type="string" office:value-type="string">
            <text:p>ENG20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string" office:value-type="string">
            <text:p>METODOLOGIAS DEL DESARROLLO</text:p>
          </table:table-cell>
          <table:table-cell calcext:value-type="string" office:value-type="string">
            <text:p>MET20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string" office:value-type="string">
            <text:p>ESTRUCTURA DE DATOS</text:p>
          </table:table-cell>
          <table:table-cell calcext:value-type="string" office:value-type="string">
            <text:p>EDA3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string" office:value-type="string">
            <text:p>BASES DE DATOS I</text:p>
          </table:table-cell>
          <table:table-cell calcext:value-type="string" office:value-type="string">
            <text:p>BDD3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string" office:value-type="string">
            <text:p>INGENIERIA DE REQUISITOS</text:p>
          </table:table-cell>
          <table:table-cell calcext:value-type="string" office:value-type="string">
            <text:p>REQ3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string" office:value-type="string">
            <text:p>INGLES II</text:p>
          </table:table-cell>
          <table:table-cell calcext:value-type="string" office:value-type="string">
            <text:p>ENG30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string" office:value-type="string">
            <text:p>ESTADISTICA</text:p>
          </table:table-cell>
          <table:table-cell calcext:value-type="string" office:value-type="string">
            <text:p>EST3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string" office:value-type="string">
            <text:p>INGENIERIA DE SOFTWARE I</text:p>
          </table:table-cell>
          <table:table-cell calcext:value-type="string" office:value-type="string">
            <text:p>ISW4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string" office:value-type="string">
            <text:p>BASES DE DATOS II</text:p>
          </table:table-cell>
          <table:table-cell calcext:value-type="string" office:value-type="string">
            <text:p>BDD4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string" office:value-type="string">
            <text:p>SISTEMAS OPERATIVOS</text:p>
          </table:table-cell>
          <table:table-cell calcext:value-type="string" office:value-type="string">
            <text:p>SO4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string" office:value-type="string">
            <text:p>DISEÑO DE SOFTWARE</text:p>
          </table:table-cell>
          <table:table-cell calcext:value-type="string" office:value-type="string">
            <text:p>DSW4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string" office:value-type="string">
            <text:p>REDES DE COMPUTADORES</text:p>
          </table:table-cell>
          <table:table-cell calcext:value-type="string" office:value-type="string">
            <text:p>RED4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string" office:value-type="string">
            <text:p>FISICA I</text:p>
          </table:table-cell>
          <table:table-cell calcext:value-type="string" office:value-type="string">
            <text:p>FSC5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string" office:value-type="string">
            <text:p>FISICA II</text:p>
          </table:table-cell>
          <table:table-cell calcext:value-type="string" office:value-type="string">
            <text:p>FSC60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string" office:value-type="string" table:style-name="ce9">
            <text:p>ALGEBRA LINEAL</text:p>
          </table:table-cell>
          <table:table-cell calcext:value-type="string" office:value-type="string">
            <text:p>ALG302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string" office:value-type="string">
            <text:p>CALCULO II</text:p>
          </table:table-cell>
          <table:table-cell calcext:value-type="string" office:value-type="string">
            <text:p>CAL30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Sin deescripcion</text:p>
          </table:table-cell>
        </table:table-row>
        <table:table-row table:style-name="ro1">
          <table:table-cell calcext:value-type="string" office:value-type="string">
            <text:p>26</text:p>
          </table:table-cell>
          <table:table-cell calcext:value-type="string" office:value-type="string">
            <text:p>MATEMATICAS DISCRETAS</text:p>
          </table:table-cell>
          <table:table-cell calcext:value-type="string" office:value-type="string">
            <text:p>GXT32</text:p>
          </table:table-cell>
          <table:table-cell calcext:value-type="string" office:value-type="string">
            <text:p>3</text:p>
          </table:table-cell>
          <table:table-cell calcext:value-type="string" office:value-type="string">
            <text:p>Esta es una mejor descripcion</text:p>
          </table:table-cell>
        </table:table-row>
      </table:table>
      <table:table table:name="Group" table:style-name="ta1">
        <table:table-column table:default-cell-style-name="ce8" table:number-columns-repeated="5" table:style-name="co1"/>
        <table:table-column table:default-cell-style-name="Default" table:style-name="co8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  <table:table-cell/>
        </table:table-row>
        <table:table-row table:style-name="ro1">
          <table:table-cell calcext:value-type="float" office:value="1" office:value-type="float" table:number-columns-repeated="2">
            <text:p>1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FPR1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" office:value-type="float" table:number-columns-repeated="3">
            <text:p>2</text:p>
          </table:table-cell>
          <table:table-cell calcext:value-type="string" office:value-type="string">
            <text:p>MAT1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" office:value-type="float" table:number-columns-repeated="2">
            <text:p>3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LOG204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4" office:value-type="float" table:number-columns-repeated="3">
            <text:p>4</text:p>
          </table:table-cell>
          <table:table-cell calcext:value-type="string" office:value-type="string">
            <text:p>COM102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5" office:value-type="float" table:number-columns-repeated="2">
            <text:p>5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ING202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6" office:value-type="float" table:number-columns-repeated="2">
            <text:p>6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POO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7" office:value-type="float" table:number-columns-repeated="2">
            <text:p>7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CAL2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8" office:value-type="float" table:number-columns-repeated="2">
            <text:p>8</text:p>
          </table:table-cell>
          <table:table-cell calcext:value-type="float" office:value="14" office:value-type="float">
            <text:p>14</text:p>
          </table:table-cell>
          <table:table-cell calcext:value-type="string" office:value-type="string">
            <text:p>ARG2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9" office:value-type="float" table:number-columns-repeated="2">
            <text:p>9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ENG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0" office:value-type="float" table:number-columns-repeated="2">
            <text:p>10</text:p>
          </table:table-cell>
          <table:table-cell calcext:value-type="float" office:value="15" office:value-type="float">
            <text:p>15</text:p>
          </table:table-cell>
          <table:table-cell calcext:value-type="string" office:value-type="string">
            <text:p>MET201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1" office:value-type="float" table:number-columns-repeated="2">
            <text:p>11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EDA301-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2" office:value-type="float" table:number-columns-repeated="2">
            <text:p>12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BDD301-G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3" office:value-type="float" table:number-columns-repeated="2">
            <text:p>13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REQ301-H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4" office:value-type="float" table:number-columns-repeated="2">
            <text:p>14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ENG3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5" office:value-type="float" table:number-columns-repeated="2">
            <text:p>15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EST3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6" office:value-type="float" table:number-columns-repeated="2">
            <text:p>16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ISW4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7" office:value-type="float" table:number-columns-repeated="2">
            <text:p>17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BDD4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8" office:value-type="float" table:number-columns-repeated="2">
            <text:p>18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SO4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19" office:value-type="float" table:number-columns-repeated="2">
            <text:p>19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DSW4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0" office:value-type="float" table:number-columns-repeated="2">
            <text:p>20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RED401-E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1" office:value-type="float">
            <text:p>1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FPR1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2" office:value-type="float">
            <text:p>2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MAT1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3" office:value-type="float">
            <text:p>3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LOG204-E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4" office:value-type="float">
            <text:p>4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COM102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5" office:value-type="float">
            <text:p>5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ING202-H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6" office:value-type="float">
            <text:p>6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POO2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7" office:value-type="float">
            <text:p>7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CAL201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23" office:value-type="float">
            <text:p>23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ALG302-A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21" office:value-type="float">
            <text:p>21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FSC501-B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9" office:value-type="float">
            <text:p>9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ENG201-C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11" office:value-type="float">
            <text:p>11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EDA301-E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24" office:value-type="float">
            <text:p>24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CAL301-R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12" office:value-type="float">
            <text:p>12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BDD301-O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22" office:value-type="float">
            <text:p>22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FSC601-GF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14" office:value-type="float">
            <text:p>14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ENG301-L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17" office:value-type="float">
            <text:p>17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BDD401-K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18" office:value-type="float">
            <text:p>18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SO401-LM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15" office:value-type="float">
            <text:p>15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EST301-Z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16" office:value-type="float">
            <text:p>16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ISW401-D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20" office:value-type="float">
            <text:p>20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RED401-V</text:p>
          </table:table-cell>
          <table:table-cell calcext:value-type="float" office:value="30" office:value-type="float">
            <text:p>30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GroupSchedule" table:style-name="ta1">
        <table:table-column table:default-cell-style-name="ce8" table:style-name="co9"/>
        <table:table-column table:default-cell-style-name="ce8" table:number-columns-repeated="2" table:style-name="co1"/>
        <table:table-column table:default-cell-style-name="ce10" table:style-name="co10"/>
        <table:table-column table:default-cell-style-name="ce10" table:style-name="co4"/>
        <table:table-column table:default-cell-style-name="ce8" table:style-name="co9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 table:style-name="ce8">
            <text:p>startTime</text:p>
          </table:table-cell>
          <table:table-cell calcext:value-type="string" office:value-type="string" table:style-name="ce8">
            <text:p>endTime</text:p>
          </table:table-cell>
          <table:table-cell calcext:value-type="string" office:value-type="string">
            <text:p>classroom</text:p>
          </table:table-cell>
        </table:table-row>
        <table:table-row table:style-name="ro1">
          <table:table-cell calcext:value-type="float" office:value="1" office:value-type="float" table:number-columns-repeated="2">
            <text:p>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float" office:value="1" office:value-type="float">
            <text:p>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2" office:value-type="float">
            <text:p>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float" office:value="3" office:value-type="float">
            <text:p>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A103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float" office:value="4" office:value-type="float">
            <text:p>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float" office:value="5" office:value-type="float">
            <text:p>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A101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float" office:value="6" office:value-type="float">
            <text:p>6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JUEV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float" office:value="7" office:value-type="float">
            <text:p>7</text:p>
          </table:table-cell>
          <table:table-cell calcext:value-type="string" office:value-type="string">
            <text:p>VIER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JUEV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float" office:value="8" office:value-type="float">
            <text:p>8</text:p>
          </table:table-cell>
          <table:table-cell calcext:value-type="string" office:value-type="string">
            <text:p>VIER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float" office:value="9" office:value-type="float">
            <text:p>9</text:p>
          </table:table-cell>
          <table:table-cell calcext:value-type="string" office:value-type="string">
            <text:p>MARTES</text:p>
          </table:table-cell>
          <table:table-cell calcext:value-type="time" office:time-value="PT07H00M00S" office:value-type="time">
            <text:p>07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float" office:value="10" office:value-type="float">
            <text:p>10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B201</text:p>
          </table:table-cell>
        </table:table-row>
        <table:table-row table:style-name="ro1">
          <table:table-cell calcext:value-type="float" office:value="16" office:value-type="float">
            <text:p>16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7" office:value-type="float">
            <text:p>17</text:p>
          </table:table-cell>
          <table:table-cell calcext:value-type="float" office:value="11" office:value-type="float">
            <text:p>1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8" office:value-type="float">
            <text:p>18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19" office:value-type="float">
            <text:p>19</text:p>
          </table:table-cell>
          <table:table-cell calcext:value-type="float" office:value="12" office:value-type="float">
            <text:p>1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0" office:value-type="float">
            <text:p>20</text:p>
          </table:table-cell>
          <table:table-cell calcext:value-type="float" office:value="13" office:value-type="float">
            <text:p>1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1" office:value-type="float">
            <text:p>21</text:p>
          </table:table-cell>
          <table:table-cell calcext:value-type="float" office:value="14" office:value-type="float">
            <text:p>1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2" office:value-type="float">
            <text:p>22</text:p>
          </table:table-cell>
          <table:table-cell calcext:value-type="float" office:value="15" office:value-type="float">
            <text:p>1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C301</text:p>
          </table:table-cell>
        </table:table-row>
        <table:table-row table:style-name="ro1">
          <table:table-cell calcext:value-type="float" office:value="23" office:value-type="float">
            <text:p>23</text:p>
          </table:table-cell>
          <table:table-cell calcext:value-type="float" office:value="16" office:value-type="float">
            <text:p>16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4" office:value-type="float">
            <text:p>24</text:p>
          </table:table-cell>
          <table:table-cell calcext:value-type="float" office:value="16" office:value-type="float">
            <text:p>16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5" office:value-type="float">
            <text:p>25</text:p>
          </table:table-cell>
          <table:table-cell calcext:value-type="float" office:value="17" office:value-type="float">
            <text:p>17</text:p>
          </table:table-cell>
          <table:table-cell calcext:value-type="string" office:value-type="string">
            <text:p>JUEV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6" office:value-type="float">
            <text:p>26</text:p>
          </table:table-cell>
          <table:table-cell calcext:value-type="float" office:value="17" office:value-type="float">
            <text:p>17</text:p>
          </table:table-cell>
          <table:table-cell calcext:value-type="string" office:value-type="string">
            <text:p>VIER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7" office:value-type="float">
            <text:p>27</text:p>
          </table:table-cell>
          <table:table-cell calcext:value-type="float" office:value="18" office:value-type="float">
            <text:p>18</text:p>
          </table:table-cell>
          <table:table-cell calcext:value-type="string" office:value-type="string">
            <text:p>JUEV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8" office:value-type="float">
            <text:p>28</text:p>
          </table:table-cell>
          <table:table-cell calcext:value-type="float" office:value="18" office:value-type="float">
            <text:p>18</text:p>
          </table:table-cell>
          <table:table-cell calcext:value-type="string" office:value-type="string">
            <text:p>VIER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29" office:value-type="float">
            <text:p>29</text:p>
          </table:table-cell>
          <table:table-cell calcext:value-type="float" office:value="19" office:value-type="float">
            <text:p>19</text:p>
          </table:table-cell>
          <table:table-cell calcext:value-type="string" office:value-type="string">
            <text:p>MARTES</text:p>
          </table:table-cell>
          <table:table-cell calcext:value-type="time" office:time-value="PT07H00M00S" office:value-type="time">
            <text:p>07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30" office:value-type="float">
            <text:p>30</text:p>
          </table:table-cell>
          <table:table-cell calcext:value-type="float" office:value="20" office:value-type="float">
            <text:p>2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D401</text:p>
          </table:table-cell>
        </table:table-row>
        <table:table-row table:style-name="ro1">
          <table:table-cell calcext:value-type="float" office:value="31" office:value-type="float">
            <text:p>31</text:p>
          </table:table-cell>
          <table:table-cell calcext:value-type="float" office:value="22" office:value-type="float">
            <text:p>22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2" office:value-type="float">
            <text:p>32</text:p>
          </table:table-cell>
          <table:table-cell calcext:value-type="float" office:value="22" office:value-type="float">
            <text:p>22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3" office:value-type="float">
            <text:p>33</text:p>
          </table:table-cell>
          <table:table-cell calcext:value-type="float" office:value="21" office:value-type="float">
            <text:p>21</text:p>
          </table:table-cell>
          <table:table-cell calcext:value-type="string" office:value-type="string">
            <text:p>MART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4" office:value-type="float">
            <text:p>34</text:p>
          </table:table-cell>
          <table:table-cell calcext:value-type="float" office:value="21" office:value-type="float">
            <text:p>21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5" office:value-type="float">
            <text:p>35</text:p>
          </table:table-cell>
          <table:table-cell calcext:value-type="float" office:value="24" office:value-type="float">
            <text:p>24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6" office:value-type="float">
            <text:p>36</text:p>
          </table:table-cell>
          <table:table-cell calcext:value-type="float" office:value="25" office:value-type="float">
            <text:p>25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7" office:value-type="float">
            <text:p>37</text:p>
          </table:table-cell>
          <table:table-cell calcext:value-type="float" office:value="23" office:value-type="float">
            <text:p>23</text:p>
          </table:table-cell>
          <table:table-cell calcext:value-type="string" office:value-type="string">
            <text:p>MIERCOL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E501</text:p>
          </table:table-cell>
        </table:table-row>
        <table:table-row table:style-name="ro1">
          <table:table-cell calcext:value-type="float" office:value="38" office:value-type="float">
            <text:p>38</text:p>
          </table:table-cell>
          <table:table-cell calcext:value-type="float" office:value="26" office:value-type="float">
            <text:p>26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39" office:value-type="float">
            <text:p>39</text:p>
          </table:table-cell>
          <table:table-cell calcext:value-type="float" office:value="26" office:value-type="float">
            <text:p>26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0" office:value-type="float">
            <text:p>40</text:p>
          </table:table-cell>
          <table:table-cell calcext:value-type="float" office:value="27" office:value-type="float">
            <text:p>27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1" office:value-type="float">
            <text:p>41</text:p>
          </table:table-cell>
          <table:table-cell calcext:value-type="float" office:value="27" office:value-type="float">
            <text:p>27</text:p>
          </table:table-cell>
          <table:table-cell calcext:value-type="string" office:value-type="string">
            <text:p>VIER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2" office:value-type="float">
            <text:p>42</text:p>
          </table:table-cell>
          <table:table-cell calcext:value-type="float" office:value="28" office:value-type="float">
            <text:p>28</text:p>
          </table:table-cell>
          <table:table-cell calcext:value-type="string" office:value-type="string">
            <text:p>JUEV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3" office:value-type="float">
            <text:p>43</text:p>
          </table:table-cell>
          <table:table-cell calcext:value-type="float" office:value="28" office:value-type="float">
            <text:p>28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4" office:value-type="float">
            <text:p>44</text:p>
          </table:table-cell>
          <table:table-cell calcext:value-type="float" office:value="29" office:value-type="float">
            <text:p>29</text:p>
          </table:table-cell>
          <table:table-cell calcext:value-type="string" office:value-type="string">
            <text:p>MARTES</text:p>
          </table:table-cell>
          <table:table-cell calcext:value-type="time" office:time-value="PT18H00M00S" office:value-type="time">
            <text:p>06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5" office:value-type="float">
            <text:p>45</text:p>
          </table:table-cell>
          <table:table-cell calcext:value-type="float" office:value="30" office:value-type="float">
            <text:p>3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F601</text:p>
          </table:table-cell>
        </table:table-row>
        <table:table-row table:style-name="ro1">
          <table:table-cell calcext:value-type="float" office:value="46" office:value-type="float">
            <text:p>46</text:p>
          </table:table-cell>
          <table:table-cell calcext:value-type="float" office:value="31" office:value-type="float">
            <text:p>31</text:p>
          </table:table-cell>
          <table:table-cell calcext:value-type="string" office:value-type="string">
            <text:p>LUN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7" office:value-type="float">
            <text:p>47</text:p>
          </table:table-cell>
          <table:table-cell calcext:value-type="float" office:value="31" office:value-type="float">
            <text:p>31</text:p>
          </table:table-cell>
          <table:table-cell calcext:value-type="string" office:value-type="string">
            <text:p>MIERCOLES</text:p>
          </table:table-cell>
          <table:table-cell calcext:value-type="time" office:time-value="PT08H00M00S" office:value-type="time">
            <text:p>08:00:00 AM</text:p>
          </table:table-cell>
          <table:table-cell calcext:value-type="time" office:time-value="PT10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8" office:value-type="float">
            <text:p>48</text:p>
          </table:table-cell>
          <table:table-cell calcext:value-type="float" office:value="32" office:value-type="float">
            <text:p>32</text:p>
          </table:table-cell>
          <table:table-cell calcext:value-type="string" office:value-type="string">
            <text:p>MARTES</text:p>
          </table:table-cell>
          <table:table-cell calcext:value-type="time" office:time-value="PT32H00M00S" office:value-type="time">
            <text:p>08:00:00 AM</text:p>
          </table:table-cell>
          <table:table-cell calcext:value-type="time" office:time-value="PT34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49" office:value-type="float">
            <text:p>49</text:p>
          </table:table-cell>
          <table:table-cell calcext:value-type="float" office:value="32" office:value-type="float">
            <text:p>32</text:p>
          </table:table-cell>
          <table:table-cell calcext:value-type="string" office:value-type="string">
            <text:p>JUEVES</text:p>
          </table:table-cell>
          <table:table-cell calcext:value-type="time" office:time-value="PT56H00M00S" office:value-type="time">
            <text:p>08:00:00 AM</text:p>
          </table:table-cell>
          <table:table-cell calcext:value-type="time" office:time-value="PT58H00M00S" office:value-type="time">
            <text:p>10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0" office:value-type="float">
            <text:p>50</text:p>
          </table:table-cell>
          <table:table-cell calcext:value-type="float" office:value="33" office:value-type="float">
            <text:p>33</text:p>
          </table:table-cell>
          <table:table-cell calcext:value-type="string" office:value-type="string">
            <text:p>VIERNES</text:p>
          </table:table-cell>
          <table:table-cell calcext:value-type="time" office:time-value="PT80H00M00S" office:value-type="time">
            <text:p>08:00:00 AM</text:p>
          </table:table-cell>
          <table:table-cell calcext:value-type="time" office:time-value="PT11H00M00S" office:value-type="time">
            <text:p>11:00:00 A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1" office:value-type="float">
            <text:p>51</text:p>
          </table:table-cell>
          <table:table-cell calcext:value-type="float" office:value="34" office:value-type="float">
            <text:p>34</text:p>
          </table:table-cell>
          <table:table-cell calcext:value-type="string" office:value-type="string">
            <text:p>LUN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2" office:value-type="float">
            <text:p>52</text:p>
          </table:table-cell>
          <table:table-cell calcext:value-type="float" office:value="35" office:value-type="float">
            <text:p>35</text:p>
          </table:table-cell>
          <table:table-cell calcext:value-type="string" office:value-type="string">
            <text:p>MIERCOLES</text:p>
          </table:table-cell>
          <table:table-cell calcext:value-type="time" office:time-value="PT10H00M00S" office:value-type="time">
            <text:p>10:00:00 AM</text:p>
          </table:table-cell>
          <table:table-cell calcext:value-type="time" office:time-value="PT12H00M00S" office:value-type="time">
            <text:p>12:00:00 PM</text:p>
          </table:table-cell>
          <table:table-cell calcext:value-type="string" office:value-type="string">
            <text:p>G601</text:p>
          </table:table-cell>
        </table:table-row>
        <table:table-row table:style-name="ro1">
          <table:table-cell calcext:value-type="float" office:value="53" office:value-type="float">
            <text:p>53</text:p>
          </table:table-cell>
          <table:table-cell calcext:value-type="float" office:value="36" office:value-type="float">
            <text:p>36</text:p>
          </table:table-cell>
          <table:table-cell calcext:value-type="string" office:value-type="string">
            <text:p>LU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4" office:value-type="float">
            <text:p>54</text:p>
          </table:table-cell>
          <table:table-cell calcext:value-type="float" office:value="36" office:value-type="float">
            <text:p>36</text:p>
          </table:table-cell>
          <table:table-cell calcext:value-type="string" office:value-type="string">
            <text:p>LU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5" office:value-type="float">
            <text:p>55</text:p>
          </table:table-cell>
          <table:table-cell calcext:value-type="float" office:value="37" office:value-type="float">
            <text:p>37</text:p>
          </table:table-cell>
          <table:table-cell calcext:value-type="string" office:value-type="string">
            <text:p>JUEV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6" office:value-type="float">
            <text:p>56</text:p>
          </table:table-cell>
          <table:table-cell calcext:value-type="float" office:value="37" office:value-type="float">
            <text:p>37</text:p>
          </table:table-cell>
          <table:table-cell calcext:value-type="string" office:value-type="string">
            <text:p>VIERN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7" office:value-type="float">
            <text:p>57</text:p>
          </table:table-cell>
          <table:table-cell calcext:value-type="float" office:value="38" office:value-type="float">
            <text:p>38</text:p>
          </table:table-cell>
          <table:table-cell calcext:value-type="string" office:value-type="string">
            <text:p>JUEVES</text:p>
          </table:table-cell>
          <table:table-cell calcext:value-type="time" office:time-value="PT19H00M00S" office:value-type="time">
            <text:p>07:00:00 PM</text:p>
          </table:table-cell>
          <table:table-cell calcext:value-type="time" office:time-value="PT22H00M00S" office:value-type="time">
            <text:p>10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8" office:value-type="float">
            <text:p>58</text:p>
          </table:table-cell>
          <table:table-cell calcext:value-type="float" office:value="38" office:value-type="float">
            <text:p>38</text:p>
          </table:table-cell>
          <table:table-cell calcext:value-type="string" office:value-type="string">
            <text:p>VIERN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59" office:value-type="float">
            <text:p>59</text:p>
          </table:table-cell>
          <table:table-cell calcext:value-type="float" office:value="39" office:value-type="float">
            <text:p>39</text:p>
          </table:table-cell>
          <table:table-cell calcext:value-type="string" office:value-type="string">
            <text:p>MARTES</text:p>
          </table:table-cell>
          <table:table-cell calcext:value-type="time" office:time-value="PT18H00M00S" office:value-type="time">
            <text:p>06:00:00 PM</text:p>
          </table:table-cell>
          <table:table-cell calcext:value-type="time" office:time-value="PT20H00M00S" office:value-type="time">
            <text:p>08:00:00 PM</text:p>
          </table:table-cell>
          <table:table-cell calcext:value-type="string" office:value-type="string">
            <text:p>F401</text:p>
          </table:table-cell>
        </table:table-row>
        <table:table-row table:style-name="ro1">
          <table:table-cell calcext:value-type="float" office:value="60" office:value-type="float">
            <text:p>60</text:p>
          </table:table-cell>
          <table:table-cell calcext:value-type="float" office:value="40" office:value-type="float">
            <text:p>40</text:p>
          </table:table-cell>
          <table:table-cell calcext:value-type="string" office:value-type="string">
            <text:p>MIERCOLES</text:p>
          </table:table-cell>
          <table:table-cell calcext:value-type="time" office:time-value="PT17H00M00S" office:value-type="time">
            <text:p>05:00:00 PM</text:p>
          </table:table-cell>
          <table:table-cell calcext:value-type="time" office:time-value="PT21H00M00S" office:value-type="time">
            <text:p>09:00:00 PM</text:p>
          </table:table-cell>
          <table:table-cell calcext:value-type="string" office:value-type="string">
            <text:p>F401</text:p>
          </table:table-cell>
        </table:table-row>
      </table:table>
      <table:table table:name="Teachers" table:style-name="ta1">
        <table:table-column table:default-cell-style-name="ce8" table:style-name="co1"/>
        <table:table-column table:default-cell-style-name="ce15" table:style-name="co11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 table:style-name="ce8">
            <text:p>name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 table:style-name="ce8">
            <text:p>Carlos Gomez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 table:style-name="ce8">
            <text:p>Ana Rodriguez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 table:style-name="ce8">
            <text:p>Luis Martinez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 table:style-name="ce8">
            <text:p>Sandra Perez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string" office:value-type="string" table:style-name="ce8">
            <text:p>Diego Herrera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string" office:value-type="string" table:style-name="ce11">
            <text:p>Juan Pérez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string" office:value-type="string" table:style-name="ce11">
            <text:p>María González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string" office:value-type="string">
            <text:p>Carlos Rodríguez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string" office:value-type="string">
            <text:p>Sofía Martínez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string" office:value-type="string">
            <text:p>Andrés López</text:p>
          </table:table-cell>
        </table:table-row>
        <table:table-row table:style-name="ro1">
          <table:table-cell calcext:value-type="float" office:value="11" office:value-type="float">
            <text:p>11</text:p>
          </table:table-cell>
          <table:table-cell calcext:value-type="string" office:value-type="string">
            <text:p>Valentina Hernández</text:p>
          </table:table-cell>
        </table:table-row>
        <table:table-row table:style-name="ro1">
          <table:table-cell calcext:value-type="float" office:value="12" office:value-type="float">
            <text:p>12</text:p>
          </table:table-cell>
          <table:table-cell calcext:value-type="string" office:value-type="string">
            <text:p>Daniel Torres</text:p>
          </table:table-cell>
        </table:table-row>
        <table:table-row table:style-name="ro1">
          <table:table-cell calcext:value-type="float" office:value="13" office:value-type="float">
            <text:p>13</text:p>
          </table:table-cell>
          <table:table-cell calcext:value-type="string" office:value-type="string">
            <text:p>Camila Ramírez</text:p>
          </table:table-cell>
        </table:table-row>
        <table:table-row table:style-name="ro1">
          <table:table-cell calcext:value-type="float" office:value="14" office:value-type="float">
            <text:p>14</text:p>
          </table:table-cell>
          <table:table-cell calcext:value-type="string" office:value-type="string">
            <text:p>Sebastián Castro</text:p>
          </table:table-cell>
        </table:table-row>
        <table:table-row table:style-name="ro1">
          <table:table-cell calcext:value-type="float" office:value="15" office:value-type="float">
            <text:p>15</text:p>
          </table:table-cell>
          <table:table-cell calcext:value-type="string" office:value-type="string">
            <text:p>Isabella Vargas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 table:style-name="ro1">
          <table:table-cell calcext:value-type="string" office:value-type="string">
            <text:p>1</text:p>
          </table:table-cell>
          <table:table-cell calcext:value-type="string" office:value-type="string">
            <text:p>Juan</text:p>
          </table:table-cell>
          <table:table-cell calcext:value-type="string" office:value-type="string">
            <text:p>Pérez</text:p>
          </table:table-cell>
          <table:table-cell calcext:value-type="string" office:value-type="string">
            <text:p>CC</text:p>
          </table:table-cell>
          <table:table-cell calcext:value-type="string" office:value-type="string">
            <text:p>123456789</text:p>
          </table:table-cell>
          <table:table-cell calcext:value-type="string" office:value-type="string">
            <text:p>2002-05-15</text:p>
          </table:table-cell>
          <table:table-cell calcext:value-type="string" office:value-type="string">
            <text:p>MALE</text:p>
          </table:table-cell>
          <table:table-cell calcext:value-type="string" office:value-type="string">
            <text:p>3001234567</text:p>
          </table:table-cell>
          <table:table-cell calcext:value-type="string" office:value-type="string">
            <text:p>Calle 123 #45-67</text:p>
          </table:table-cell>
          <table:table-cell calcext:value-type="string" office:value-type="string">
            <text:p>juan.perez@email.com</text:p>
          </table:table-cell>
          <table:table-cell calcext:value-type="string" office:value-type="string">
            <text:p>$2a$10$wDxp0zf/UGZq8QfJxn4A1OPTSzy8OYDBhAS5q45fxQy.V1GjvOwSy</text:p>
          </table:table-cell>
          <table:table-cell calcext:value-type="string" office:value-type="string">
            <text:p>ACTIVE</text:p>
          </table:table-cell>
          <table:table-cell calcext:value-type="string" office:value-type="string">
            <text:p>STUDENT</text:p>
          </table:table-cell>
          <table:table-cell calcext:value-type="string" office:value-type="string">
            <text:p>2026-06-01T04:38:06.433237752</text:p>
          </table:table-cell>
        </table:table-row>
        <table:table-row table:style-name="ro1">
          <table:table-cell calcext:value-type="string" office:value-type="string">
            <text:p>2</text:p>
          </table:table-cell>
          <table:table-cell calcext:value-type="string" office:value-type="string">
            <text:p>Ana</text:p>
          </table:table-cell>
          <table:table-cell calcext:value-type="string" office:value-type="string">
            <text:p>Gomez</text:p>
          </table:table-cell>
          <table:table-cell calcext:value-type="string" office:value-type="string">
            <text:p>CC</text:p>
          </table:table-cell>
          <table:table-cell calcext:value-type="string" office:value-type="string">
            <text:p>123456786</text:p>
          </table:table-cell>
          <table:table-cell calcext:value-type="string" office:value-type="string">
            <text:p>2002-05-15</text:p>
          </table:table-cell>
          <table:table-cell calcext:value-type="string" office:value-type="string">
            <text:p>MALE</text:p>
          </table:table-cell>
          <table:table-cell calcext:value-type="string" office:value-type="string">
            <text:p>3001234567</text:p>
          </table:table-cell>
          <table:table-cell calcext:value-type="string" office:value-type="string">
            <text:p>Calle 123 #45-67</text:p>
          </table:table-cell>
          <table:table-cell calcext:value-type="string" office:value-type="string">
            <text:p>ana.gomez@email.com</text:p>
          </table:table-cell>
          <table:table-cell calcext:value-type="string" office:value-type="string">
            <text:p>$2a$10$qGimAV51KyRz0u9nayvHjeYSkdYrpHh117JFRE/r1w8AYhw9pvOum</text:p>
          </table:table-cell>
          <table:table-cell calcext:value-type="string" office:value-type="string">
            <text:p>ACTIVE</text:p>
          </table:table-cell>
          <table:table-cell calcext:value-type="string" office:value-type="string">
            <text:p>STUDENT</text:p>
          </table:table-cell>
          <table:table-cell calcext:value-type="string" office:value-type="string">
            <text:p>2026-06-01T04:44:57.075978448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Joan" office:value-type="string">
            <text:p>Joan</text:p>
          </table:table-cell>
          <table:table-cell calcext:value-type="string" office:string-value="Vergara" office:value-type="string">
            <text:p>Vergar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90" office:value-type="string">
            <text:p>1234567890</text:p>
          </table:table-cell>
          <table:table-cell calcext:value-type="string" office:string-value="2003-05-15" office:value-type="string">
            <text:p>2003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rtagena, Bolívar" office:value-type="string">
            <text:p>Cartagena, Bolívar</text:p>
          </table:table-cell>
          <table:table-cell calcext:value-type="string" office:string-value="jvergarav3@gmail.com" office:value-type="string">
            <text:p>jvergarav3@gmail.com</text:p>
          </table:table-cell>
          <table:table-cell calcext:value-type="string" office:string-value="$2a$10$vL1In03Q4.S4vXq3y.pni.CjCbt29A.Vfm/t9kuprAbYSD2Sy51qS" office:value-type="string">
            <text:p>$2a$10$vL1In03Q4.S4vXq3y.pni.CjCbt29A.Vfm/t9kuprAbYSD2Sy51qS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7T14:40:40.573736806" office:value-type="string">
            <text:p>2026-06-07T14:40:40.573736806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</table:table-row>
        <table:table-row table:style-name="ro1">
          <table:table-cell calcext:value-type="string" office:value-type="string">
            <text:p>1</text:p>
          </table:table-cell>
          <table:table-cell calcext:value-type="string" office:value-type="string">
            <text:p>56526302</text:p>
          </table:table-cell>
          <table:table-cell calcext:value-type="string" office:value-type="string">
            <text:p>1</text:p>
          </table:table-cell>
        </table:table-row>
        <table:table-row table:style-name="ro1">
          <table:table-cell calcext:value-type="string" office:value-type="string">
            <text:p>2</text:p>
          </table:table-cell>
          <table:table-cell calcext:value-type="string" office:value-type="string">
            <text:p>33054516</text:p>
          </table:table-cell>
          <table:table-cell calcext:value-type="string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75997562" office:value-type="string">
            <text:p>75997562</text:p>
          </table:table-cell>
          <table:table-cell calcext:value-type="string" office:string-value="3" office:value-type="string">
            <text:p>3</text:p>
          </table:table-cell>
        </table:table-row>
      </table:table>
      <table:table table:name="Enrollments" table:style-name="ta1">
        <table:table-column table:default-cell-style-name="Default" table:number-columns-repeated="4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</table:table-row>
        <table:table-row table:style-name="ro1">
          <table:table-cell calcext:value-type="string" office:value-type="string" table:number-columns-repeated="3">
            <text:p>1</text:p>
          </table:table-cell>
          <table:table-cell calcext:value-type="string" office:value-type="string">
            <text:p>2026-06-01</text:p>
          </table:table-cell>
        </table:table-row>
        <table:table-row table:style-name="ro1">
          <table:table-cell calcext:value-type="string" office:value-type="string" table:number-columns-repeated="2">
            <text:p>2</text:p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026-06-01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7" office:value-type="string">
            <text:p>2026-06-07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 table:style-name="ro1">
          <table:table-cell calcext:value-type="float" office:value="1" office:value-type="float">
            <text:p>1</text:p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1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float" office:value="2" office:value-type="float">
            <text:p>2</text:p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2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float" office:value="3" office:value-type="float">
            <text:p>3</text:p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3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4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float" office:value="5" office:value-type="float">
            <text:p>5</text:p>
          </table:table-cell>
          <table:table-cell calcext:value-type="string" office:value-type="string">
            <text:p>1</text:p>
          </table:table-cell>
          <table:table-cell calcext:value-type="string" office:value-type="string">
            <text:p>25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float" office:value="6" office:value-type="float">
            <text:p>6</text:p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1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float" office:value="7" office:value-type="float">
            <text:p>7</text:p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2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float" office:value="8" office:value-type="float">
            <text:p>8</text:p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3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float" office:value="9" office:value-type="float">
            <text:p>9</text:p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4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string" office:value-type="string">
            <text:p>2</text:p>
          </table:table-cell>
          <table:table-cell calcext:value-type="string" office:value-type="string">
            <text:p>25</text:p>
          </table:table-cell>
          <table:table-cell calcext:value-type="string" office:value-type="string">
            <text:p>ENROLLED</text:p>
          </table:table-cell>
          <table:table-cell calcext:value-type="float" office:value="0" office:value-type="float">
            <text:p>0</text:p>
          </table:table-cell>
        </table:table-row>
        <table:table-row>
          <table:table-cell calcext:value-type="float" office:string-value="11" office:value-type="string">
            <text:p>1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value="0.0" office:value-type="float">
            <text:p>0.0</text:p>
          </table:table-cell>
        </table:table-row>
        <table:table-row>
          <table:table-cell calcext:value-type="float" office:string-value="12" office:value-type="string">
            <text:p>1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value="0.0" office:value-type="float">
            <text:p>0.0</text:p>
          </table:table-cell>
        </table:table-row>
        <table:table-row>
          <table:table-cell calcext:value-type="float" office:string-value="13" office:value-type="string">
            <text:p>1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value="0.0" office:value-type="float">
            <text:p>0.0</text:p>
          </table:table-cell>
        </table:table-row>
        <table:table-row>
          <table:table-cell calcext:value-type="float" office:string-value="14" office:value-type="string">
            <text:p>1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value="0.0" office:value-type="float">
            <text:p>0.0</text:p>
          </table:table-cell>
        </table:table-row>
        <table:table-row>
          <table:table-cell calcext:value-type="float" office:string-value="15" office:value-type="string">
            <text:p>1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float" office:value="0.0" office:value-type="float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ystem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font-pitch="variable" style:name="Nimbus Sans" svg:font-family="'Nimbus Sans'"/>
    <style:font-face style:font-family-generic="system" style:font-pitch="variable" style:name="Noto Sans Arabic" svg:font-family="'Noto Sans Arabic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size="12pt" fo:language="en" loext:opacity="0%" style:country-asian="CN" style:country-complex="IN" style:font-family-complex="'Noto Sans'" style:font-family-generic-complex="system" style:font-name="Liberation Serif" style:font-name-asian="DejaVu Sans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11:52:03.8528793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03T12:06:42.894466733</dc:date>
    <meta:editing-duration>PT13H16S</meta:editing-duration>
    <meta:editing-cycles>23</meta:editing-cycles>
    <meta:document-statistic meta:table-count="14" meta:cell-count="1108" meta:object-count="0"/>
  </office:meta>
</office:document-meta>
</file>