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ystem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font-pitch="variable" style:name="Nimbus Sans" svg:font-family="'Nimbus Sans'"/>
    <style:font-face style:font-family-generic="system" style:font-pitch="variable" style:name="Noto Sans Arabic" svg:font-family="'Noto Sans Arabic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1.4043in"/>
    </style:style>
    <style:style style:family="table-column" style:name="co3">
      <style:table-column-properties fo:break-before="auto" style:column-width="1.5547in"/>
    </style:style>
    <style:style style:family="table-column" style:name="co4">
      <style:table-column-properties fo:break-before="auto" style:column-width="1.1256in"/>
    </style:style>
    <style:style style:family="table-column" style:name="co5">
      <style:table-column-properties fo:break-before="auto" style:column-width="0.9972in"/>
    </style:style>
    <style:style style:family="table-column" style:name="co6">
      <style:table-column-properties fo:break-before="auto" style:column-width="1.4154in"/>
    </style:style>
    <style:style style:family="table-column" style:name="co7">
      <style:table-column-properties fo:break-before="auto" style:column-width="3.0984in"/>
    </style:style>
    <style:style style:family="table-column" style:name="co8">
      <style:table-column-properties fo:break-before="auto" style:column-width="1.1575in"/>
    </style:style>
    <style:style style:family="table-column" style:name="co9">
      <style:table-column-properties fo:break-before="auto" style:column-width="1.1689in"/>
    </style:style>
    <style:style style:family="table-column" style:name="co10">
      <style:table-column-properties fo:break-before="auto" style:column-width="1.1362in"/>
    </style:style>
    <style:style style:family="table-column" style:name="co11">
      <style:table-column-properties fo:break-before="auto" style:column-width="1.5118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family="table-cell" style:name="ce8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9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Liberation Serif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data-style-name="N63" style:family="table-cell" style:name="ce10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11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family="table-cell" style:name="ce15" style:parent-style-name="Default">
      <style:table-cell-properties fo:wrap-option="no-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 table:style-name="ro1">
          <table:table-cell calcext:value-type="float" office:string-value="1" office:value="1" office:value-type="string">
            <text:p>1</text:p>
          </table:table-cell>
          <table:table-cell calcext:value-type="string" office:string-value="ADMIN" office:value-type="string">
            <text:p>ADMIN</text:p>
          </table:table-cell>
        </table:table-row>
        <table:table-row table:style-name="ro1">
          <table:table-cell calcext:value-type="float" office:string-value="2" office:value="2" office:value-type="string">
            <text:p>2</text:p>
          </table:table-cell>
          <table:table-cell calcext:value-type="string" office:string-value="TEACHER" office:value-type="string">
            <text:p>TEACHER</text:p>
          </table:table-cell>
        </table:table-row>
        <table:table-row table:style-name="ro1">
          <table:table-cell calcext:value-type="float" office:string-value="3" office:value="3" office:value-type="string">
            <text:p>3</text:p>
          </table:table-cell>
          <table:table-cell calcext:value-type="string" office:string-value="STUDENT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 table:style-name="ro1"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3" office:value-type="string">
            <text:p>3</text:p>
          </table:table-cell>
        </table:table-row>
        <table:table-row table:style-name="ro1"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 table:style-name="ro1"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  <table:table-row table:style-name="ro1">
          <table:table-cell calcext:value-type="string" office:string-value="4" office:value-type="string">
            <text:p>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3" office:value-type="string">
            <text:p>3</text:p>
          </table:table-cell>
        </table:table-row>
      </table:table>
      <table:table table:name="AcademicProgram" table:style-name="ta1">
        <table:table-column table:default-cell-style-name="ce8" table:style-name="co2"/>
        <table:table-column table:default-cell-style-name="ce8" table:style-name="co3"/>
        <table:table-column table:default-cell-style-name="ce8" table:style-name="co4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 table:style-name="ro1">
          <table:table-cell calcext:value-type="float" office:string-value="1" office:value="1" office:value-type="string">
            <text:p>1</text:p>
          </table:table-cell>
          <table:table-cell calcext:value-type="string" office:string-value="Ingenieria de Sistemas" office:value-type="string">
            <text:p>Ingenieria de Sistemas</text:p>
          </table:table-cell>
          <table:table-cell calcext:value-type="float" office:string-value="10" office:value="10" office:value-type="string">
            <text:p>10</text:p>
          </table:table-cell>
        </table:table-row>
        <table:table-row table:style-name="ro1">
          <table:table-cell calcext:value-type="float" office:string-value="2" office:value="2" office:value-type="string">
            <text:p>2</text:p>
          </table:table-cell>
          <table:table-cell calcext:value-type="string" office:string-value="Ingenieria de Software" office:value-type="string">
            <text:p>Ingenieria de Software</text:p>
          </table:table-cell>
          <table:table-cell calcext:value-type="float" office:string-value="10" office:value="10" office:value-type="string">
            <text:p>10</text:p>
          </table:table-cell>
        </table:table-row>
        <table:table-row table:style-name="ro1">
          <table:table-cell calcext:value-type="float" office:string-value="3" office:value="3" office:value-type="string">
            <text:p>3</text:p>
          </table:table-cell>
          <table:table-cell calcext:value-type="string" office:string-value="Ingenieria Civil" office:value-type="string">
            <text:p>Ingenieria Civil</text:p>
          </table:table-cell>
          <table:table-cell calcext:value-type="float" office:string-value="10" office:value="10" office:value-type="string">
            <text:p>10</text:p>
          </table:table-cell>
        </table:table-row>
        <table:table-row table:style-name="ro1">
          <table:table-cell calcext:value-type="float" office:string-value="4" office:value="4" office:value-type="string">
            <text:p>4</text:p>
          </table:table-cell>
          <table:table-cell calcext:value-type="string" office:string-value="Ingenieria de Alimentos" office:value-type="string">
            <text:p>Ingenieria de Alimentos</text:p>
          </table:table-cell>
          <table:table-cell calcext:value-type="float" office:string-value="10" office:value="10" office:value-type="string">
            <text:p>10</text:p>
          </table:table-cell>
        </table:table-row>
      </table:table>
      <table:table table:name="SemesterTemplate" table:style-name="ta1">
        <table:table-column table:default-cell-style-name="ce8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 table:style-name="ro1">
          <table:table-cell calcext:value-type="float" office:string-value="1" office:value="1" office:value-type="string">
            <text:p>1</text:p>
          </table:table-cell>
          <table:table-cell calcext:value-type="float" office:string-value="2" office:value="2" office:value-type="string">
            <text:p>2</text:p>
          </table:table-cell>
          <table:table-cell calcext:value-type="float" office:string-value="1" office:value="1" office:value-type="string">
            <text:p>1</text:p>
          </table:table-cell>
        </table:table-row>
        <table:table-row table:style-name="ro1">
          <table:table-cell calcext:value-type="float" office:string-value="2" office:value="2" office:value-type="string">
            <text:p>2</text:p>
          </table:table-cell>
          <table:table-cell calcext:value-type="float" office:string-value="2" office:value="2" office:value-type="string">
            <text:p>2</text:p>
          </table:table-cell>
          <table:table-cell calcext:value-type="float" office:string-value="2" office:value="2" office:value-type="string">
            <text:p>2</text:p>
          </table:table-cell>
        </table:table-row>
        <table:table-row table:style-name="ro1">
          <table:table-cell calcext:value-type="float" office:string-value="3" office:value="3" office:value-type="string">
            <text:p>3</text:p>
          </table:table-cell>
          <table:table-cell calcext:value-type="float" office:string-value="2" office:value="2" office:value-type="string">
            <text:p>2</text:p>
          </table:table-cell>
          <table:table-cell calcext:value-type="float" office:string-value="3" office:value="3" office:value-type="string">
            <text:p>3</text:p>
          </table:table-cell>
        </table:table-row>
        <table:table-row table:style-name="ro1">
          <table:table-cell calcext:value-type="float" office:string-value="4" office:value="4" office:value-type="string">
            <text:p>4</text:p>
          </table:table-cell>
          <table:table-cell calcext:value-type="float" office:string-value="2" office:value="2" office:value-type="string">
            <text:p>2</text:p>
          </table:table-cell>
          <table:table-cell calcext:value-type="float" office:string-value="4" office:value="4" office:value-type="string">
            <text:p>4</text:p>
          </table:table-cell>
        </table:table-row>
        <table:table-row table:style-name="ro1">
          <table:table-cell calcext:value-type="float" office:string-value="5" office:value="5" office:value-type="string">
            <text:p>5</text:p>
          </table:table-cell>
          <table:table-cell calcext:value-type="float" office:string-value="1" office:value="1" office:value-type="string">
            <text:p>1</text:p>
          </table:table-cell>
          <table:table-cell calcext:value-type="float" office:string-value="1" office:value="1" office:value-type="string">
            <text:p>1</text:p>
          </table:table-cell>
        </table:table-row>
        <table:table-row table:style-name="ro1">
          <table:table-cell calcext:value-type="float" office:string-value="6" office:value="6" office:value-type="string">
            <text:p>6</text:p>
          </table:table-cell>
          <table:table-cell calcext:value-type="float" office:string-value="1" office:value="1" office:value-type="string">
            <text:p>1</text:p>
          </table:table-cell>
          <table:table-cell calcext:value-type="float" office:string-value="2" office:value="2" office:value-type="string">
            <text:p>2</text:p>
          </table:table-cell>
        </table:table-row>
        <table:table-row table:style-name="ro1">
          <table:table-cell calcext:value-type="float" office:string-value="7" office:value="7" office:value-type="string">
            <text:p>7</text:p>
          </table:table-cell>
          <table:table-cell calcext:value-type="float" office:string-value="1" office:value="1" office:value-type="string">
            <text:p>1</text:p>
          </table:table-cell>
          <table:table-cell calcext:value-type="float" office:string-value="3" office:value="3" office:value-type="string">
            <text:p>3</text:p>
          </table:table-cell>
        </table:table-row>
        <table:table-row table:style-name="ro1">
          <table:table-cell calcext:value-type="float" office:string-value="8" office:value="8" office:value-type="string">
            <text:p>8</text:p>
          </table:table-cell>
          <table:table-cell calcext:value-type="float" office:string-value="1" office:value="1" office:value-type="string">
            <text:p>1</text:p>
          </table:table-cell>
          <table:table-cell calcext:value-type="float" office:string-value="4" office:value="4" office:value-type="string">
            <text:p>4</text:p>
          </table:table-cell>
        </table:table-row>
      </table:table>
      <table:table table:name="SemesterTemplateDetails" table:style-name="ta1">
        <table:table-column table:default-cell-style-name="ce8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 table:style-name="ro1">
          <table:table-cell calcext:value-type="float" office:string-value="22" office:value="1" office:value-type="string">
            <text:p>22</text:p>
          </table:table-cell>
          <table:table-cell calcext:value-type="float" office:string-value="5" office:value="1" office:value-type="string">
            <text:p>5</text:p>
          </table:table-cell>
          <table:table-cell calcext:value-type="float" office:string-value="22" office:value="1" office:value-type="string">
            <text:p>22</text:p>
          </table:table-cell>
        </table:table-row>
        <table:table-row table:style-name="ro1">
          <table:table-cell calcext:value-type="float" office:string-value="23" office:value="2" office:value-type="string">
            <text:p>23</text:p>
          </table:table-cell>
          <table:table-cell calcext:value-type="float" office:string-value="5" office:value="1" office:value-type="string">
            <text:p>5</text:p>
          </table:table-cell>
          <table:table-cell calcext:value-type="float" office:string-value="23" office:value="2" office:value-type="string">
            <text:p>23</text:p>
          </table:table-cell>
        </table:table-row>
        <table:table-row table:style-name="ro1">
          <table:table-cell calcext:value-type="float" office:string-value="24" office:value="3" office:value-type="string">
            <text:p>24</text:p>
          </table:table-cell>
          <table:table-cell calcext:value-type="float" office:string-value="5" office:value="1" office:value-type="string">
            <text:p>5</text:p>
          </table:table-cell>
          <table:table-cell calcext:value-type="float" office:string-value="24" office:value="3" office:value-type="string">
            <text:p>24</text:p>
          </table:table-cell>
        </table:table-row>
        <table:table-row table:style-name="ro1">
          <table:table-cell calcext:value-type="float" office:string-value="25" office:value="4" office:value-type="string">
            <text:p>25</text:p>
          </table:table-cell>
          <table:table-cell calcext:value-type="float" office:string-value="5" office:value="1" office:value-type="string">
            <text:p>5</text:p>
          </table:table-cell>
          <table:table-cell calcext:value-type="float" office:string-value="25" office:value="4" office:value-type="string">
            <text:p>25</text:p>
          </table:table-cell>
        </table:table-row>
        <table:table-row table:style-name="ro1">
          <table:table-cell calcext:value-type="float" office:string-value="26" office:value="5" office:value-type="string">
            <text:p>26</text:p>
          </table:table-cell>
          <table:table-cell calcext:value-type="float" office:string-value="6" office:value="1" office:value-type="string">
            <text:p>6</text:p>
          </table:table-cell>
          <table:table-cell calcext:value-type="float" office:string-value="26" office:value="5" office:value-type="string">
            <text:p>26</text:p>
          </table:table-cell>
        </table:table-row>
        <table:table-row table:style-name="ro1">
          <table:table-cell calcext:value-type="float" office:string-value="27" office:value="6" office:value-type="string">
            <text:p>27</text:p>
          </table:table-cell>
          <table:table-cell calcext:value-type="float" office:string-value="6" office:value="2" office:value-type="string">
            <text:p>6</text:p>
          </table:table-cell>
          <table:table-cell calcext:value-type="float" office:string-value="27" office:value="6" office:value-type="string">
            <text:p>27</text:p>
          </table:table-cell>
        </table:table-row>
        <table:table-row table:style-name="ro1">
          <table:table-cell calcext:value-type="float" office:string-value="28" office:value="7" office:value-type="string">
            <text:p>28</text:p>
          </table:table-cell>
          <table:table-cell calcext:value-type="float" office:string-value="6" office:value="2" office:value-type="string">
            <text:p>6</text:p>
          </table:table-cell>
          <table:table-cell calcext:value-type="float" office:string-value="28" office:value="7" office:value-type="string">
            <text:p>28</text:p>
          </table:table-cell>
        </table:table-row>
        <table:table-row table:style-name="ro1">
          <table:table-cell calcext:value-type="float" office:string-value="29" office:value="8" office:value-type="string">
            <text:p>29</text:p>
          </table:table-cell>
          <table:table-cell calcext:value-type="float" office:string-value="6" office:value="2" office:value-type="string">
            <text:p>6</text:p>
          </table:table-cell>
          <table:table-cell calcext:value-type="float" office:string-value="29" office:value="8" office:value-type="string">
            <text:p>29</text:p>
          </table:table-cell>
        </table:table-row>
        <table:table-row table:style-name="ro1">
          <table:table-cell calcext:value-type="float" office:string-value="30" office:value="9" office:value-type="string">
            <text:p>30</text:p>
          </table:table-cell>
          <table:table-cell calcext:value-type="float" office:string-value="6" office:value="2" office:value-type="string">
            <text:p>6</text:p>
          </table:table-cell>
          <table:table-cell calcext:value-type="float" office:string-value="30" office:value="9" office:value-type="string">
            <text:p>30</text:p>
          </table:table-cell>
        </table:table-row>
        <table:table-row table:style-name="ro1">
          <table:table-cell calcext:value-type="float" office:string-value="31" office:value="10" office:value-type="string">
            <text:p>31</text:p>
          </table:table-cell>
          <table:table-cell calcext:value-type="float" office:string-value="7" office:value="2" office:value-type="string">
            <text:p>7</text:p>
          </table:table-cell>
          <table:table-cell calcext:value-type="float" office:string-value="31" office:value="10" office:value-type="string">
            <text:p>31</text:p>
          </table:table-cell>
        </table:table-row>
        <table:table-row table:style-name="ro1">
          <table:table-cell calcext:value-type="float" office:string-value="10" office:value="11" office:value-type="string">
            <text:p>10</text:p>
          </table:table-cell>
          <table:table-cell calcext:value-type="float" office:string-value="2" office:value="3" office:value-type="string">
            <text:p>2</text:p>
          </table:table-cell>
          <table:table-cell calcext:value-type="float" office:string-value="10" office:value="11" office:value-type="string">
            <text:p>10</text:p>
          </table:table-cell>
        </table:table-row>
        <table:table-row table:style-name="ro1">
          <table:table-cell calcext:value-type="float" office:string-value="32" office:value="12" office:value-type="string">
            <text:p>32</text:p>
          </table:table-cell>
          <table:table-cell calcext:value-type="float" office:string-value="7" office:value="3" office:value-type="string">
            <text:p>7</text:p>
          </table:table-cell>
          <table:table-cell calcext:value-type="float" office:string-value="32" office:value="12" office:value-type="string">
            <text:p>32</text:p>
          </table:table-cell>
        </table:table-row>
        <table:table-row table:style-name="ro1">
          <table:table-cell calcext:value-type="float" office:string-value="11" office:value="13" office:value-type="string">
            <text:p>11</text:p>
          </table:table-cell>
          <table:table-cell calcext:value-type="float" office:string-value="3" office:value="3" office:value-type="string">
            <text:p>3</text:p>
          </table:table-cell>
          <table:table-cell calcext:value-type="float" office:string-value="11" office:value="13" office:value-type="string">
            <text:p>11</text:p>
          </table:table-cell>
        </table:table-row>
        <table:table-row table:style-name="ro1">
          <table:table-cell calcext:value-type="float" office:string-value="33" office:value="14" office:value-type="string">
            <text:p>33</text:p>
          </table:table-cell>
          <table:table-cell calcext:value-type="float" office:string-value="7" office:value="3" office:value-type="string">
            <text:p>7</text:p>
          </table:table-cell>
          <table:table-cell calcext:value-type="float" office:string-value="33" office:value="14" office:value-type="string">
            <text:p>33</text:p>
          </table:table-cell>
        </table:table-row>
        <table:table-row table:style-name="ro1">
          <table:table-cell calcext:value-type="float" office:string-value="12" office:value="15" office:value-type="string">
            <text:p>12</text:p>
          </table:table-cell>
          <table:table-cell calcext:value-type="float" office:string-value="3" office:value="3" office:value-type="string">
            <text:p>3</text:p>
          </table:table-cell>
          <table:table-cell calcext:value-type="float" office:string-value="12" office:value="15" office:value-type="string">
            <text:p>12</text:p>
          </table:table-cell>
        </table:table-row>
        <table:table-row table:style-name="ro1">
          <table:table-cell calcext:value-type="float" office:string-value="34" office:value="16" office:value-type="string">
            <text:p>34</text:p>
          </table:table-cell>
          <table:table-cell calcext:value-type="float" office:string-value="7" office:value="4" office:value-type="string">
            <text:p>7</text:p>
          </table:table-cell>
          <table:table-cell calcext:value-type="float" office:string-value="34" office:value="16" office:value-type="string">
            <text:p>34</text:p>
          </table:table-cell>
        </table:table-row>
        <table:table-row table:style-name="ro1">
          <table:table-cell calcext:value-type="float" office:string-value="13" office:value="17" office:value-type="string">
            <text:p>13</text:p>
          </table:table-cell>
          <table:table-cell calcext:value-type="float" office:string-value="3" office:value="4" office:value-type="string">
            <text:p>3</text:p>
          </table:table-cell>
          <table:table-cell calcext:value-type="float" office:string-value="13" office:value="17" office:value-type="string">
            <text:p>13</text:p>
          </table:table-cell>
        </table:table-row>
        <table:table-row table:style-name="ro1">
          <table:table-cell calcext:value-type="float" office:string-value="35" office:value="18" office:value-type="string">
            <text:p>35</text:p>
          </table:table-cell>
          <table:table-cell calcext:value-type="float" office:string-value="7" office:value="4" office:value-type="string">
            <text:p>7</text:p>
          </table:table-cell>
          <table:table-cell calcext:value-type="float" office:string-value="35" office:value="18" office:value-type="string">
            <text:p>35</text:p>
          </table:table-cell>
        </table:table-row>
        <table:table-row table:style-name="ro1">
          <table:table-cell calcext:value-type="float" office:string-value="14" office:value="19" office:value-type="string">
            <text:p>14</text:p>
          </table:table-cell>
          <table:table-cell calcext:value-type="float" office:string-value="3" office:value="4" office:value-type="string">
            <text:p>3</text:p>
          </table:table-cell>
          <table:table-cell calcext:value-type="float" office:string-value="14" office:value="19" office:value-type="string">
            <text:p>14</text:p>
          </table:table-cell>
        </table:table-row>
        <table:table-row table:style-name="ro1">
          <table:table-cell calcext:value-type="float" office:string-value="36" office:value="20" office:value-type="string">
            <text:p>36</text:p>
          </table:table-cell>
          <table:table-cell calcext:value-type="float" office:string-value="8" office:value="4" office:value-type="string">
            <text:p>8</text:p>
          </table:table-cell>
          <table:table-cell calcext:value-type="float" office:string-value="36" office:value="20" office:value-type="string">
            <text:p>36</text:p>
          </table:table-cell>
        </table:table-row>
        <table:table-row table:style-name="ro1">
          <table:table-cell calcext:value-type="float" office:string-value="15" office:value="21" office:value-type="string">
            <text:p>15</text:p>
          </table:table-cell>
          <table:table-cell calcext:value-type="float" office:string-value="3" office:value="5" office:value-type="string">
            <text:p>3</text:p>
          </table:table-cell>
          <table:table-cell calcext:value-type="float" office:string-value="15" office:value="21" office:value-type="string">
            <text:p>15</text:p>
          </table:table-cell>
        </table:table-row>
        <table:table-row table:style-name="ro1">
          <table:table-cell calcext:value-type="float" office:string-value="37" office:value="22" office:value-type="string">
            <text:p>37</text:p>
          </table:table-cell>
          <table:table-cell calcext:value-type="float" office:string-value="8" office:value="5" office:value-type="string">
            <text:p>8</text:p>
          </table:table-cell>
          <table:table-cell calcext:value-type="float" office:string-value="37" office:value="22" office:value-type="string">
            <text:p>37</text:p>
          </table:table-cell>
        </table:table-row>
        <table:table-row table:style-name="ro1">
          <table:table-cell calcext:value-type="float" office:string-value="16" office:value="23" office:value-type="string">
            <text:p>16</text:p>
          </table:table-cell>
          <table:table-cell calcext:value-type="float" office:string-value="4" office:value="5" office:value-type="string">
            <text:p>4</text:p>
          </table:table-cell>
          <table:table-cell calcext:value-type="float" office:string-value="16" office:value="23" office:value-type="string">
            <text:p>16</text:p>
          </table:table-cell>
        </table:table-row>
        <table:table-row table:style-name="ro1">
          <table:table-cell calcext:value-type="float" office:string-value="38" office:value="24" office:value-type="string">
            <text:p>38</text:p>
          </table:table-cell>
          <table:table-cell calcext:value-type="float" office:string-value="8" office:value="5" office:value-type="string">
            <text:p>8</text:p>
          </table:table-cell>
          <table:table-cell calcext:value-type="float" office:string-value="38" office:value="24" office:value-type="string">
            <text:p>38</text:p>
          </table:table-cell>
        </table:table-row>
        <table:table-row table:style-name="ro1">
          <table:table-cell calcext:value-type="float" office:string-value="17" office:value="25" office:value-type="string">
            <text:p>17</text:p>
          </table:table-cell>
          <table:table-cell calcext:value-type="float" office:string-value="4" office:value="5" office:value-type="string">
            <text:p>4</text:p>
          </table:table-cell>
          <table:table-cell calcext:value-type="float" office:string-value="17" office:value="25" office:value-type="string">
            <text:p>17</text:p>
          </table:table-cell>
        </table:table-row>
        <table:table-row table:style-name="ro1">
          <table:table-cell calcext:value-type="float" office:string-value="39" office:value="26" office:value-type="string">
            <text:p>39</text:p>
          </table:table-cell>
          <table:table-cell calcext:value-type="float" office:string-value="8" office:value="6" office:value-type="string">
            <text:p>8</text:p>
          </table:table-cell>
          <table:table-cell calcext:value-type="float" office:string-value="39" office:value="26" office:value-type="string">
            <text:p>39</text:p>
          </table:table-cell>
        </table:table-row>
        <table:table-row table:style-name="ro1">
          <table:table-cell calcext:value-type="float" office:string-value="18" office:value="27" office:value-type="string">
            <text:p>18</text:p>
          </table:table-cell>
          <table:table-cell calcext:value-type="float" office:string-value="4" office:value="6" office:value-type="string">
            <text:p>4</text:p>
          </table:table-cell>
          <table:table-cell calcext:value-type="float" office:string-value="18" office:value="27" office:value-type="string">
            <text:p>18</text:p>
          </table:table-cell>
        </table:table-row>
        <table:table-row table:style-name="ro1">
          <table:table-cell calcext:value-type="float" office:string-value="19" office:value="28" office:value-type="string">
            <text:p>19</text:p>
          </table:table-cell>
          <table:table-cell calcext:value-type="float" office:string-value="4" office:value="6" office:value-type="string">
            <text:p>4</text:p>
          </table:table-cell>
          <table:table-cell calcext:value-type="float" office:string-value="19" office:value="28" office:value-type="string">
            <text:p>19</text:p>
          </table:table-cell>
        </table:table-row>
        <table:table-row table:style-name="ro1">
          <table:table-cell calcext:value-type="float" office:string-value="1" office:value="29" office:value-type="string">
            <text:p>1</text:p>
          </table:table-cell>
          <table:table-cell calcext:value-type="float" office:string-value="1" office:value="6" office:value-type="string">
            <text:p>1</text:p>
          </table:table-cell>
          <table:table-cell calcext:value-type="float" office:string-value="1" office:value="29" office:value-type="string">
            <text:p>1</text:p>
          </table:table-cell>
        </table:table-row>
        <table:table-row table:style-name="ro1">
          <table:table-cell calcext:value-type="float" office:string-value="2" office:value="30" office:value-type="string">
            <text:p>2</text:p>
          </table:table-cell>
          <table:table-cell calcext:value-type="float" office:string-value="1" office:value="6" office:value-type="string">
            <text:p>1</text:p>
          </table:table-cell>
          <table:table-cell calcext:value-type="float" office:string-value="2" office:value="30" office:value-type="string">
            <text:p>2</text:p>
          </table:table-cell>
        </table:table-row>
        <table:table-row table:style-name="ro1">
          <table:table-cell calcext:value-type="float" office:string-value="3" office:value="31" office:value-type="string">
            <text:p>3</text:p>
          </table:table-cell>
          <table:table-cell calcext:value-type="float" office:string-value="1" office:value="7" office:value-type="string">
            <text:p>1</text:p>
          </table:table-cell>
          <table:table-cell calcext:value-type="float" office:string-value="3" office:value="31" office:value-type="string">
            <text:p>3</text:p>
          </table:table-cell>
        </table:table-row>
        <table:table-row table:style-name="ro1">
          <table:table-cell calcext:value-type="float" office:string-value="4" office:value="32" office:value-type="string">
            <text:p>4</text:p>
          </table:table-cell>
          <table:table-cell calcext:value-type="float" office:string-value="1" office:value="7" office:value-type="string">
            <text:p>1</text:p>
          </table:table-cell>
          <table:table-cell calcext:value-type="float" office:string-value="4" office:value="32" office:value-type="string">
            <text:p>4</text:p>
          </table:table-cell>
        </table:table-row>
        <table:table-row table:style-name="ro1">
          <table:table-cell calcext:value-type="float" office:string-value="5" office:value="33" office:value-type="string">
            <text:p>5</text:p>
          </table:table-cell>
          <table:table-cell calcext:value-type="float" office:string-value="1" office:value="7" office:value-type="string">
            <text:p>1</text:p>
          </table:table-cell>
          <table:table-cell calcext:value-type="float" office:string-value="5" office:value="33" office:value-type="string">
            <text:p>5</text:p>
          </table:table-cell>
        </table:table-row>
        <table:table-row table:style-name="ro1">
          <table:table-cell calcext:value-type="float" office:string-value="6" office:value="34" office:value-type="string">
            <text:p>6</text:p>
          </table:table-cell>
          <table:table-cell calcext:value-type="float" office:string-value="2" office:value="7" office:value-type="string">
            <text:p>2</text:p>
          </table:table-cell>
          <table:table-cell calcext:value-type="float" office:string-value="6" office:value="34" office:value-type="string">
            <text:p>6</text:p>
          </table:table-cell>
        </table:table-row>
        <table:table-row table:style-name="ro1">
          <table:table-cell calcext:value-type="float" office:string-value="7" office:value="35" office:value-type="string">
            <text:p>7</text:p>
          </table:table-cell>
          <table:table-cell calcext:value-type="float" office:string-value="2" office:value="7" office:value-type="string">
            <text:p>2</text:p>
          </table:table-cell>
          <table:table-cell calcext:value-type="float" office:string-value="7" office:value="35" office:value-type="string">
            <text:p>7</text:p>
          </table:table-cell>
        </table:table-row>
        <table:table-row table:style-name="ro1">
          <table:table-cell calcext:value-type="float" office:string-value="8" office:value="36" office:value-type="string">
            <text:p>8</text:p>
          </table:table-cell>
          <table:table-cell calcext:value-type="float" office:string-value="2" office:value="8" office:value-type="string">
            <text:p>2</text:p>
          </table:table-cell>
          <table:table-cell calcext:value-type="float" office:string-value="8" office:value="36" office:value-type="string">
            <text:p>8</text:p>
          </table:table-cell>
        </table:table-row>
        <table:table-row table:style-name="ro1">
          <table:table-cell calcext:value-type="float" office:string-value="9" office:value="37" office:value-type="string">
            <text:p>9</text:p>
          </table:table-cell>
          <table:table-cell calcext:value-type="float" office:string-value="2" office:value="8" office:value-type="string">
            <text:p>2</text:p>
          </table:table-cell>
          <table:table-cell calcext:value-type="float" office:string-value="9" office:value="37" office:value-type="string">
            <text:p>9</text:p>
          </table:table-cell>
        </table:table-row>
        <table:table-row table:style-name="ro1">
          <table:table-cell calcext:value-type="float" office:string-value="40" office:value="38" office:value-type="string">
            <text:p>40</text:p>
          </table:table-cell>
          <table:table-cell calcext:value-type="float" office:string-value="8" office:value="8" office:value-type="string">
            <text:p>8</text:p>
          </table:table-cell>
          <table:table-cell calcext:value-type="float" office:string-value="40" office:value="38" office:value-type="string">
            <text:p>40</text:p>
          </table:table-cell>
        </table:table-row>
        <table:table-row table:style-name="ro1">
          <table:table-cell calcext:value-type="float" office:string-value="20" office:value="39" office:value-type="string">
            <text:p>20</text:p>
          </table:table-cell>
          <table:table-cell calcext:value-type="float" office:string-value="4" office:value="8" office:value-type="string">
            <text:p>4</text:p>
          </table:table-cell>
          <table:table-cell calcext:value-type="float" office:string-value="20" office:value="39" office:value-type="string">
            <text:p>20</text:p>
          </table:table-cell>
        </table:table-row>
        <table:table-row table:style-name="ro1">
          <table:table-cell calcext:value-type="float" office:string-value="21" office:value="40" office:value-type="string">
            <text:p>21</text:p>
          </table:table-cell>
          <table:table-cell calcext:value-type="float" office:string-value="5" office:value="8" office:value-type="string">
            <text:p>5</text:p>
          </table:table-cell>
          <table:table-cell calcext:value-type="float" office:string-value="21" office:value="40" office:value-type="string">
            <text:p>21</text:p>
          </table:table-cell>
        </table:table-row>
      </table:table>
      <table:table table:name="Prerequisite" table:style-name="ta1">
        <table:table-column table:default-cell-style-name="ce8" table:style-name="co1"/>
        <table:table-column table:default-cell-style-name="ce8" table:style-name="co5"/>
        <table:table-column table:default-cell-style-name="ce8" table:style-name="co6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 table:style-name="ro1">
          <table:table-cell calcext:value-type="float" office:string-value="11" office:value="1" office:value-type="string">
            <text:p>11</text:p>
          </table:table-cell>
          <table:table-cell calcext:value-type="float" office:string-value="21" office:value="6" office:value-type="string">
            <text:p>21</text:p>
          </table:table-cell>
          <table:table-cell calcext:value-type="float" office:string-value="2" office:value="1" office:value-type="string">
            <text:p>2</text:p>
          </table:table-cell>
        </table:table-row>
        <table:table-row table:style-name="ro1">
          <table:table-cell calcext:value-type="float" office:string-value="12" office:value="2" office:value-type="string">
            <text:p>12</text:p>
          </table:table-cell>
          <table:table-cell calcext:value-type="float" office:string-value="22" office:value="7" office:value-type="string">
            <text:p>22</text:p>
          </table:table-cell>
          <table:table-cell calcext:value-type="float" office:string-value="21" office:value="2" office:value-type="string">
            <text:p>21</text:p>
          </table:table-cell>
        </table:table-row>
        <table:table-row table:style-name="ro1">
          <table:table-cell calcext:value-type="float" office:string-value="13" office:value="3" office:value-type="string">
            <text:p>13</text:p>
          </table:table-cell>
          <table:table-cell calcext:value-type="float" office:string-value="23" office:value="11" office:value-type="string">
            <text:p>23</text:p>
          </table:table-cell>
          <table:table-cell calcext:value-type="float" office:string-value="2" office:value="6" office:value-type="string">
            <text:p>2</text:p>
          </table:table-cell>
        </table:table-row>
        <table:table-row table:style-name="ro1">
          <table:table-cell calcext:value-type="float" office:string-value="15" office:value="4" office:value-type="string">
            <text:p>15</text:p>
          </table:table-cell>
          <table:table-cell calcext:value-type="float" office:string-value="26" office:value="12" office:value-type="string">
            <text:p>26</text:p>
          </table:table-cell>
          <table:table-cell calcext:value-type="float" office:string-value="23" office:value="6" office:value-type="string">
            <text:p>23</text:p>
          </table:table-cell>
        </table:table-row>
        <table:table-row table:style-name="ro1">
          <table:table-cell calcext:value-type="float" office:string-value="1" office:value="5" office:value-type="string">
            <text:p>1</text:p>
          </table:table-cell>
          <table:table-cell calcext:value-type="float" office:string-value="6" office:value="14" office:value-type="string">
            <text:p>6</text:p>
          </table:table-cell>
          <table:table-cell calcext:value-type="float" office:string-value="1" office:value="9" office:value-type="string">
            <text:p>1</text:p>
          </table:table-cell>
        </table:table-row>
        <table:table-row table:style-name="ro1">
          <table:table-cell calcext:value-type="float" office:string-value="2" office:value="6" office:value-type="string">
            <text:p>2</text:p>
          </table:table-cell>
          <table:table-cell calcext:value-type="float" office:string-value="7" office:value="16" office:value-type="string">
            <text:p>7</text:p>
          </table:table-cell>
          <table:table-cell calcext:value-type="float" office:string-value="2" office:value="13" office:value-type="string">
            <text:p>2</text:p>
          </table:table-cell>
        </table:table-row>
        <table:table-row table:style-name="ro1">
          <table:table-cell calcext:value-type="float" office:string-value="3" office:value="7" office:value-type="string">
            <text:p>3</text:p>
          </table:table-cell>
          <table:table-cell calcext:value-type="float" office:string-value="11" office:value="17" office:value-type="string">
            <text:p>11</text:p>
          </table:table-cell>
          <table:table-cell calcext:value-type="float" office:string-value="6" office:value="12" office:value-type="string">
            <text:p>6</text:p>
          </table:table-cell>
        </table:table-row>
        <table:table-row table:style-name="ro1">
          <table:table-cell calcext:value-type="float" office:string-value="4" office:value="8" office:value-type="string">
            <text:p>4</text:p>
          </table:table-cell>
          <table:table-cell calcext:value-type="float" office:string-value="12" office:value="18" office:value-type="string">
            <text:p>12</text:p>
          </table:table-cell>
          <table:table-cell calcext:value-type="float" office:string-value="6" office:value="8" office:value-type="string">
            <text:p>6</text:p>
          </table:table-cell>
        </table:table-row>
        <table:table-row table:style-name="ro1">
          <table:table-cell calcext:value-type="float" office:string-value="5" office:value="9" office:value-type="string">
            <text:p>5</text:p>
          </table:table-cell>
          <table:table-cell calcext:value-type="float" office:string-value="14" office:value="19" office:value-type="string">
            <text:p>14</text:p>
          </table:table-cell>
          <table:table-cell calcext:value-type="float" office:string-value="9" office:value="16" office:value-type="string">
            <text:p>9</text:p>
          </table:table-cell>
        </table:table-row>
        <table:table-row table:style-name="ro1">
          <table:table-cell calcext:value-type="float" office:string-value="6" office:value="10" office:value-type="string">
            <text:p>6</text:p>
          </table:table-cell>
          <table:table-cell calcext:value-type="float" office:string-value="16" office:value="20" office:value-type="string">
            <text:p>16</text:p>
          </table:table-cell>
          <table:table-cell calcext:value-type="float" office:string-value="13" office:value="8" office:value-type="string">
            <text:p>13</text:p>
          </table:table-cell>
        </table:table-row>
        <table:table-row table:style-name="ro1">
          <table:table-cell calcext:value-type="float" office:string-value="7" office:value="11" office:value-type="string">
            <text:p>7</text:p>
          </table:table-cell>
          <table:table-cell calcext:value-type="float" office:string-value="17" office:value="21" office:value-type="string">
            <text:p>17</text:p>
          </table:table-cell>
          <table:table-cell calcext:value-type="float" office:string-value="12" office:value="2" office:value-type="string">
            <text:p>12</text:p>
          </table:table-cell>
        </table:table-row>
        <table:table-row table:style-name="ro1">
          <table:table-cell calcext:value-type="float" office:string-value="8" office:value="12" office:value-type="string">
            <text:p>8</text:p>
          </table:table-cell>
          <table:table-cell calcext:value-type="float" office:string-value="18" office:value="22" office:value-type="string">
            <text:p>18</text:p>
          </table:table-cell>
          <table:table-cell calcext:value-type="float" office:string-value="8" office:value="21" office:value-type="string">
            <text:p>8</text:p>
          </table:table-cell>
        </table:table-row>
        <table:table-row table:style-name="ro1">
          <table:table-cell calcext:value-type="float" office:string-value="9" office:value="13" office:value-type="string">
            <text:p>9</text:p>
          </table:table-cell>
          <table:table-cell calcext:value-type="float" office:string-value="19" office:value="23" office:value-type="string">
            <text:p>19</text:p>
          </table:table-cell>
          <table:table-cell calcext:value-type="float" office:string-value="16" office:value="2" office:value-type="string">
            <text:p>16</text:p>
          </table:table-cell>
        </table:table-row>
        <table:table-row table:style-name="ro1">
          <table:table-cell calcext:value-type="string" office:string-value="10" office:value-type="string">
            <text:p>1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8" office:value-type="string">
            <text:p>8</text:p>
          </table:table-cell>
        </table:table-row>
      </table:table>
      <table:table table:name="Course" table:style-name="ta1">
        <table:table-column table:default-cell-style-name="ce8" table:style-name="co1"/>
        <table:table-column table:default-cell-style-name="ce8" table:style-name="co7"/>
        <table:table-column table:default-cell-style-name="ce8" table:number-columns-repeated="2" table:style-name="co1"/>
        <table:table-column table:default-cell-style-name="Default" table:style-name="co2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 calcext:value-type="string" office:value-type="string">
            <text:p>description</text:p>
          </table:table-cell>
        </table:table-row>
        <table:table-row table:style-name="ro1">
          <table:table-cell calcext:value-type="float" office:string-value="22" office:value="1" office:value-type="string">
            <text:p>22</text:p>
          </table:table-cell>
          <table:table-cell calcext:value-type="string" office:string-value="FISICA II" office:value-type="string">
            <text:p>FISICA II</text:p>
          </table:table-cell>
          <table:table-cell calcext:value-type="string" office:string-value="FSC601" office:value-type="string">
            <text:p>FSC601</text:p>
          </table:table-cell>
          <table:table-cell calcext:value-type="float" office:string-value="3" office:value="4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23" office:value="2" office:value-type="string">
            <text:p>23</text:p>
          </table:table-cell>
          <table:table-cell calcext:value-type="string" office:string-value="ALGEBRA LINEAL" office:value-type="string">
            <text:p>ALGEBRA LINEAL</text:p>
          </table:table-cell>
          <table:table-cell calcext:value-type="string" office:string-value="ALG302" office:value-type="string">
            <text:p>ALG302</text:p>
          </table:table-cell>
          <table:table-cell calcext:value-type="float" office:string-value="3" office:value="4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24" office:value="3" office:value-type="string">
            <text:p>24</text:p>
          </table:table-cell>
          <table:table-cell calcext:value-type="string" office:string-value="CALCULO II" office:value-type="string">
            <text:p>CALCULO II</text:p>
          </table:table-cell>
          <table:table-cell calcext:value-type="string" office:string-value="CAL301" office:value-type="string">
            <text:p>CAL301</text:p>
          </table:table-cell>
          <table:table-cell calcext:value-type="float" office:string-value="4" office:value="3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26" office:value="4" office:value-type="string">
            <text:p>26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float" office:string-value="3" office:value="2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10" office:value="5" office:value-type="string">
            <text:p>10</text:p>
          </table:table-cell>
          <table:table-cell calcext:value-type="string" office:string-value="METODOLOGIAS DEL DESARROLLO" office:value-type="string">
            <text:p>METODOLOGIAS DEL DESARROLLO</text:p>
          </table:table-cell>
          <table:table-cell calcext:value-type="string" office:string-value="MET201" office:value-type="string">
            <text:p>MET201</text:p>
          </table:table-cell>
          <table:table-cell calcext:value-type="float" office:string-value="2" office: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11" office:value="6" office:value-type="string">
            <text:p>11</text:p>
          </table:table-cell>
          <table:table-cell calcext:value-type="string" office:string-value="ESTRUCTURA DE DATOS" office:value-type="string">
            <text:p>ESTRUCTURA DE DATOS</text:p>
          </table:table-cell>
          <table:table-cell calcext:value-type="string" office:string-value="EDA301" office:value-type="string">
            <text:p>EDA301</text:p>
          </table:table-cell>
          <table:table-cell calcext:value-type="float" office:string-value="4" office: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12" office:value="7" office:value-type="string">
            <text:p>12</text:p>
          </table:table-cell>
          <table:table-cell calcext:value-type="string" office:string-value="BASES DE DATOS I" office:value-type="string">
            <text:p>BASES DE DATOS I</text:p>
          </table:table-cell>
          <table:table-cell calcext:value-type="string" office:string-value="BDD301" office:value-type="string">
            <text:p>BDD301</text:p>
          </table:table-cell>
          <table:table-cell calcext:value-type="float" office:string-value="4" office: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13" office:value="8" office:value-type="string">
            <text:p>13</text:p>
          </table:table-cell>
          <table:table-cell calcext:value-type="string" office:string-value="INGENIERIA DE REQUISITOS" office:value-type="string">
            <text:p>INGENIERIA DE REQUISITOS</text:p>
          </table:table-cell>
          <table:table-cell calcext:value-type="string" office:string-value="REQ301" office:value-type="string">
            <text:p>REQ301</text:p>
          </table:table-cell>
          <table:table-cell calcext:value-type="float" office:string-value="3" office: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14" office:value="9" office:value-type="string">
            <text:p>14</text:p>
          </table:table-cell>
          <table:table-cell calcext:value-type="string" office:string-value="INGLES II" office:value-type="string">
            <text:p>INGLES II</text:p>
          </table:table-cell>
          <table:table-cell calcext:value-type="string" office:string-value="ENG301" office:value-type="string">
            <text:p>ENG301</text:p>
          </table:table-cell>
          <table:table-cell calcext:value-type="float" office:string-value="2" office: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15" office:value="10" office:value-type="string">
            <text:p>15</text:p>
          </table:table-cell>
          <table:table-cell calcext:value-type="string" office:string-value="ESTADISTICA" office:value-type="string">
            <text:p>ESTADISTICA</text:p>
          </table:table-cell>
          <table:table-cell calcext:value-type="string" office:string-value="EST301" office:value-type="string">
            <text:p>EST301</text:p>
          </table:table-cell>
          <table:table-cell calcext:value-type="float" office:string-value="3" office:value="2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16" office:value="11" office:value-type="string">
            <text:p>16</text:p>
          </table:table-cell>
          <table:table-cell calcext:value-type="string" office:string-value="INGENIERIA DE SOFTWARE I" office:value-type="string">
            <text:p>INGENIERIA DE SOFTWARE I</text:p>
          </table:table-cell>
          <table:table-cell calcext:value-type="string" office:string-value="ISW401" office:value-type="string">
            <text:p>ISW401</text:p>
          </table:table-cell>
          <table:table-cell calcext:value-type="float" office:string-value="4" office: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17" office:value="12" office:value-type="string">
            <text:p>17</text:p>
          </table:table-cell>
          <table:table-cell calcext:value-type="string" office:string-value="BASES DE DATOS II" office:value-type="string">
            <text:p>BASES DE DATOS II</text:p>
          </table:table-cell>
          <table:table-cell calcext:value-type="string" office:string-value="BDD401" office:value-type="string">
            <text:p>BDD401</text:p>
          </table:table-cell>
          <table:table-cell calcext:value-type="float" office:string-value="4" office: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18" office:value="13" office:value-type="string">
            <text:p>18</text:p>
          </table:table-cell>
          <table:table-cell calcext:value-type="string" office:string-value="SISTEMAS OPERATIVOS" office:value-type="string">
            <text:p>SISTEMAS OPERATIVOS</text:p>
          </table:table-cell>
          <table:table-cell calcext:value-type="string" office:string-value="SO401" office:value-type="string">
            <text:p>SO401</text:p>
          </table:table-cell>
          <table:table-cell calcext:value-type="float" office:string-value="4" office:value="3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19" office:value="14" office:value-type="string">
            <text:p>19</text:p>
          </table:table-cell>
          <table:table-cell calcext:value-type="string" office:string-value="DISEÑO DE SOFTWARE" office:value-type="string">
            <text:p>DISEÑO DE SOFTWARE</text:p>
          </table:table-cell>
          <table:table-cell calcext:value-type="string" office:string-value="DSW401" office:value-type="string">
            <text:p>DSW401</text:p>
          </table:table-cell>
          <table:table-cell calcext:value-type="float" office:string-value="3" office:value="2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1" office:value="15" office:value-type="string">
            <text:p>1</text:p>
          </table:table-cell>
          <table:table-cell calcext:value-type="string" office:string-value="FUNDAMENTOS DE PROGRAMACION" office:value-type="string">
            <text:p>FUNDAMENTOS DE PROGRAMACION</text:p>
          </table:table-cell>
          <table:table-cell calcext:value-type="string" office:string-value="FPR101" office:value-type="string">
            <text:p>FPR101</text:p>
          </table:table-cell>
          <table:table-cell calcext:value-type="float" office:string-value="4" office:value="3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2" office:value="16" office:value-type="string">
            <text:p>2</text:p>
          </table:table-cell>
          <table:table-cell calcext:value-type="string" office:string-value="MATEMATICAS BASICAS" office:value-type="string">
            <text:p>MATEMATICAS BASICAS</text:p>
          </table:table-cell>
          <table:table-cell calcext:value-type="string" office:string-value="MAT101" office:value-type="string">
            <text:p>MAT101</text:p>
          </table:table-cell>
          <table:table-cell calcext:value-type="float" office:string-value="4" office: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3" office:value="17" office:value-type="string">
            <text:p>3</text:p>
          </table:table-cell>
          <table:table-cell calcext:value-type="string" office:string-value="LOGICA COMPUTACIONAL" office:value-type="string">
            <text:p>LOGICA COMPUTACIONAL</text:p>
          </table:table-cell>
          <table:table-cell calcext:value-type="string" office:string-value="LOG204" office:value-type="string">
            <text:p>LOG204</text:p>
          </table:table-cell>
          <table:table-cell calcext:value-type="float" office:string-value="3" office:value="4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4" office:value="18" office:value-type="string">
            <text:p>4</text:p>
          </table:table-cell>
          <table:table-cell calcext:value-type="string" office:string-value="COMPETENCIAS COMUNICATIVAS" office:value-type="string">
            <text:p>COMPETENCIAS COMUNICATIVAS</text:p>
          </table:table-cell>
          <table:table-cell calcext:value-type="string" office:string-value="COM102" office:value-type="string">
            <text:p>COM102</text:p>
          </table:table-cell>
          <table:table-cell calcext:value-type="float" office:string-value="2" office:value="4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5" office:value="19" office:value-type="string">
            <text:p>5</text:p>
          </table:table-cell>
          <table:table-cell calcext:value-type="string" office:string-value="INTRODUCCION A LA INGENIERIA" office:value-type="string">
            <text:p>INTRODUCCION A LA INGENIERIA</text:p>
          </table:table-cell>
          <table:table-cell calcext:value-type="string" office:string-value="ING202" office:value-type="string">
            <text:p>ING202</text:p>
          </table:table-cell>
          <table:table-cell calcext:value-type="float" office:string-value="2" office:value="3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6" office:value="20" office:value-type="string">
            <text:p>6</text:p>
          </table:table-cell>
          <table:table-cell calcext:value-type="string" office:string-value="PROGRAMACION ORIENTADA A OBJETOS" office:value-type="string">
            <text:p>PROGRAMACION ORIENTADA A OBJETOS</text:p>
          </table:table-cell>
          <table:table-cell calcext:value-type="string" office:string-value="POO201" office:value-type="string">
            <text:p>POO201</text:p>
          </table:table-cell>
          <table:table-cell calcext:value-type="float" office:string-value="4" office:value="3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7" office:value="21" office:value-type="string">
            <text:p>7</text:p>
          </table:table-cell>
          <table:table-cell calcext:value-type="string" office:string-value="CALCULO I" office:value-type="string">
            <text:p>CALCULO I</text:p>
          </table:table-cell>
          <table:table-cell calcext:value-type="string" office:string-value="CAL201" office:value-type="string">
            <text:p>CAL201</text:p>
          </table:table-cell>
          <table:table-cell calcext:value-type="float" office:string-value="4" office:value="3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8" office:value="22" office:value-type="string">
            <text:p>8</text:p>
          </table:table-cell>
          <table:table-cell calcext:value-type="string" office:string-value="ARQUITCTURA DE COMPUTADORES" office:value-type="string">
            <text:p>ARQUITCTURA DE COMPUTADORES</text:p>
          </table:table-cell>
          <table:table-cell calcext:value-type="string" office:string-value="ARG201" office:value-type="string">
            <text:p>ARG201</text:p>
          </table:table-cell>
          <table:table-cell calcext:value-type="float" office:string-value="3" office: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9" office:value="23" office:value-type="string">
            <text:p>9</text:p>
          </table:table-cell>
          <table:table-cell calcext:value-type="string" office:string-value="INGLES I" office:value-type="string" table:style-name="ce9">
            <text:p>INGLES I</text:p>
          </table:table-cell>
          <table:table-cell calcext:value-type="string" office:string-value="ENG201" office:value-type="string">
            <text:p>ENG201</text:p>
          </table:table-cell>
          <table:table-cell calcext:value-type="float" office:string-value="2" office:value="3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float" office:string-value="20" office:value="24" office:value-type="string">
            <text:p>20</text:p>
          </table:table-cell>
          <table:table-cell calcext:value-type="string" office:string-value="REDES DE COMPUTADORES" office:value-type="string">
            <text:p>REDES DE COMPUTADORES</text:p>
          </table:table-cell>
          <table:table-cell calcext:value-type="string" office:string-value="RED401" office:value-type="string">
            <text:p>RED401</text:p>
          </table:table-cell>
          <table:table-cell calcext:value-type="float" office:string-value="3" office:value="4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 table:style-name="ro1">
          <table:table-cell calcext:value-type="string" office:string-value="21" office:value-type="string">
            <text:p>21</text:p>
          </table:table-cell>
          <table:table-cell calcext:value-type="string" office:string-value="FISICA I" office:value-type="string">
            <text:p>FISICA I</text:p>
          </table:table-cell>
          <table:table-cell calcext:value-type="string" office:string-value="FSC501" office:value-type="string">
            <text:p>FSC5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FISICA I" office:value-type="string">
            <text:p>FISICA I</text:p>
          </table:table-cell>
          <table:table-cell calcext:value-type="string" office:string-value="FSC501" office:value-type="string">
            <text:p>FSC5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</table:table>
      <table:table table:name="Group" table:style-name="ta1">
        <table:table-column table:default-cell-style-name="ce8" table:number-columns-repeated="5" table:style-name="co1"/>
        <table:table-column table:default-cell-style-name="Default" table:style-name="co8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  <table:table-cell/>
        </table:table-row>
        <table:table-row table:style-name="ro1">
          <table:table-cell calcext:value-type="float" office:string-value="22" office:value="1" office:value-type="string">
            <text:p>22</text:p>
          </table:table-cell>
          <table:table-cell calcext:value-type="float" office:string-value="2" office:value="1" office:value-type="string">
            <text:p>2</text:p>
          </table:table-cell>
          <table:table-cell calcext:value-type="float" office:string-value="9" office:value="3" office:value-type="string">
            <text:p>9</text:p>
          </table:table-cell>
          <table:table-cell calcext:value-type="string" office:string-value="MAT101-B" office:value-type="string">
            <text:p>MAT101-B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23" office:value="2" office:value-type="string">
            <text:p>23</text:p>
          </table:table-cell>
          <table:table-cell calcext:value-type="float" office:string-value="3" office:value="2" office:value-type="string">
            <text:p>3</text:p>
          </table:table-cell>
          <table:table-cell calcext:value-type="float" office:string-value="10" office:value="2" office:value-type="string">
            <text:p>10</text:p>
          </table:table-cell>
          <table:table-cell calcext:value-type="string" office:string-value="LOG204-E" office:value-type="string">
            <text:p>LOG204-E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24" office:value="3" office:value-type="string">
            <text:p>24</text:p>
          </table:table-cell>
          <table:table-cell calcext:value-type="float" office:string-value="4" office:value="3" office:value-type="string">
            <text:p>4</text:p>
          </table:table-cell>
          <table:table-cell calcext:value-type="float" office:string-value="11" office:value="5" office:value-type="string">
            <text:p>11</text:p>
          </table:table-cell>
          <table:table-cell calcext:value-type="string" office:string-value="COM102-A" office:value-type="string">
            <text:p>COM102-A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25" office:value="4" office:value-type="string">
            <text:p>25</text:p>
          </table:table-cell>
          <table:table-cell calcext:value-type="float" office:string-value="5" office:value="4" office:value-type="string">
            <text:p>5</text:p>
          </table:table-cell>
          <table:table-cell calcext:value-type="float" office:string-value="12" office:value="4" office:value-type="string">
            <text:p>12</text:p>
          </table:table-cell>
          <table:table-cell calcext:value-type="string" office:string-value="ING202-H" office:value-type="string">
            <text:p>ING202-H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26" office:value="5" office:value-type="string">
            <text:p>26</text:p>
          </table:table-cell>
          <table:table-cell calcext:value-type="float" office:string-value="6" office:value="5" office:value-type="string">
            <text:p>6</text:p>
          </table:table-cell>
          <table:table-cell calcext:value-type="float" office:string-value="3" office:value="1" office:value-type="string">
            <text:p>3</text:p>
          </table:table-cell>
          <table:table-cell calcext:value-type="string" office:string-value="POO201-B" office:value-type="string">
            <text:p>POO201-B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27" office:value="6" office:value-type="string">
            <text:p>27</text:p>
          </table:table-cell>
          <table:table-cell calcext:value-type="float" office:string-value="7" office:value="6" office:value-type="string">
            <text:p>7</text:p>
          </table:table-cell>
          <table:table-cell calcext:value-type="float" office:string-value="2" office:value="7" office:value-type="string">
            <text:p>2</text:p>
          </table:table-cell>
          <table:table-cell calcext:value-type="string" office:string-value="CAL201-A" office:value-type="string">
            <text:p>CAL201-A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28" office:value="7" office:value-type="string">
            <text:p>28</text:p>
          </table:table-cell>
          <table:table-cell calcext:value-type="float" office:string-value="23" office:value="7" office:value-type="string">
            <text:p>23</text:p>
          </table:table-cell>
          <table:table-cell calcext:value-type="float" office:string-value="5" office:value="10" office:value-type="string">
            <text:p>5</text:p>
          </table:table-cell>
          <table:table-cell calcext:value-type="string" office:string-value="ALG302-A" office:value-type="string">
            <text:p>ALG302-A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29" office:value="8" office:value-type="string">
            <text:p>29</text:p>
          </table:table-cell>
          <table:table-cell calcext:value-type="float" office:string-value="21" office:value="8" office:value-type="string">
            <text:p>21</text:p>
          </table:table-cell>
          <table:table-cell calcext:value-type="float" office:string-value="4" office:value="14" office:value-type="string">
            <text:p>4</text:p>
          </table:table-cell>
          <table:table-cell calcext:value-type="string" office:string-value="FSC501-B" office:value-type="string">
            <text:p>FSC501-B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30" office:value="9" office:value-type="string">
            <text:p>30</text:p>
          </table:table-cell>
          <table:table-cell calcext:value-type="float" office:string-value="9" office:value="9" office:value-type="string">
            <text:p>9</text:p>
          </table:table-cell>
          <table:table-cell calcext:value-type="float" office:string-value="1" office:value="8" office:value-type="string">
            <text:p>1</text:p>
          </table:table-cell>
          <table:table-cell calcext:value-type="string" office:string-value="ENG201-C" office:value-type="string">
            <text:p>ENG201-C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31" office:value="10" office:value-type="string">
            <text:p>31</text:p>
          </table:table-cell>
          <table:table-cell calcext:value-type="float" office:string-value="11" office:value="10" office:value-type="string">
            <text:p>11</text:p>
          </table:table-cell>
          <table:table-cell calcext:value-type="float" office:string-value="2" office:value="15" office:value-type="string">
            <text:p>2</text:p>
          </table:table-cell>
          <table:table-cell calcext:value-type="string" office:string-value="EDA301-EF" office:value-type="string">
            <text:p>EDA301-EF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10" office:value="11" office:value-type="string">
            <text:p>10</text:p>
          </table:table-cell>
          <table:table-cell calcext:value-type="float" office:string-value="10" office:value="11" office:value-type="string">
            <text:p>10</text:p>
          </table:table-cell>
          <table:table-cell calcext:value-type="float" office:string-value="15" office:value="6" office:value-type="string">
            <text:p>15</text:p>
          </table:table-cell>
          <table:table-cell calcext:value-type="string" office:string-value="MET201-F" office:value-type="string">
            <text:p>MET201-F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32" office:value="12" office:value-type="string">
            <text:p>32</text:p>
          </table:table-cell>
          <table:table-cell calcext:value-type="float" office:string-value="24" office:value="12" office:value-type="string">
            <text:p>24</text:p>
          </table:table-cell>
          <table:table-cell calcext:value-type="float" office:string-value="3" office:value="9" office:value-type="string">
            <text:p>3</text:p>
          </table:table-cell>
          <table:table-cell calcext:value-type="string" office:string-value="CAL301-R" office:value-type="string">
            <text:p>CAL301-R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11" office:value="13" office:value-type="string">
            <text:p>11</text:p>
          </table:table-cell>
          <table:table-cell calcext:value-type="float" office:string-value="11" office:value="13" office:value-type="string">
            <text:p>11</text:p>
          </table:table-cell>
          <table:table-cell calcext:value-type="float" office:string-value="6" office:value="11" office:value-type="string">
            <text:p>6</text:p>
          </table:table-cell>
          <table:table-cell calcext:value-type="string" office:string-value="EDA301-F" office:value-type="string">
            <text:p>EDA301-F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33" office:value="14" office:value-type="string">
            <text:p>33</text:p>
          </table:table-cell>
          <table:table-cell calcext:value-type="float" office:string-value="12" office:value="14" office:value-type="string">
            <text:p>12</text:p>
          </table:table-cell>
          <table:table-cell calcext:value-type="float" office:string-value="4" office:value="9" office:value-type="string">
            <text:p>4</text:p>
          </table:table-cell>
          <table:table-cell calcext:value-type="string" office:string-value="BDD301-O" office:value-type="string">
            <text:p>BDD301-O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12" office:value="15" office:value-type="string">
            <text:p>12</text:p>
          </table:table-cell>
          <table:table-cell calcext:value-type="float" office:string-value="12" office:value="15" office:value-type="string">
            <text:p>12</text:p>
          </table:table-cell>
          <table:table-cell calcext:value-type="float" office:string-value="9" office:value="2" office:value-type="string">
            <text:p>9</text:p>
          </table:table-cell>
          <table:table-cell calcext:value-type="string" office:string-value="BDD301-G" office:value-type="string">
            <text:p>BDD301-G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34" office:value="16" office:value-type="string">
            <text:p>34</text:p>
          </table:table-cell>
          <table:table-cell calcext:value-type="float" office:string-value="22" office:value="16" office:value-type="string">
            <text:p>22</text:p>
          </table:table-cell>
          <table:table-cell calcext:value-type="float" office:string-value="5" office:value="3" office:value-type="string">
            <text:p>5</text:p>
          </table:table-cell>
          <table:table-cell calcext:value-type="string" office:string-value="FSC601-GF" office:value-type="string">
            <text:p>FSC601-GF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13" office:value="17" office:value-type="string">
            <text:p>13</text:p>
          </table:table-cell>
          <table:table-cell calcext:value-type="float" office:string-value="13" office:value="17" office:value-type="string">
            <text:p>13</text:p>
          </table:table-cell>
          <table:table-cell calcext:value-type="float" office:string-value="11" office:value="4" office:value-type="string">
            <text:p>11</text:p>
          </table:table-cell>
          <table:table-cell calcext:value-type="string" office:string-value="REQ301-H" office:value-type="string">
            <text:p>REQ301-H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35" office:value="18" office:value-type="string">
            <text:p>35</text:p>
          </table:table-cell>
          <table:table-cell calcext:value-type="float" office:string-value="14" office:value="18" office:value-type="string">
            <text:p>14</text:p>
          </table:table-cell>
          <table:table-cell calcext:value-type="float" office:string-value="6" office:value="5" office:value-type="string">
            <text:p>6</text:p>
          </table:table-cell>
          <table:table-cell calcext:value-type="string" office:string-value="ENG301-L" office:value-type="string">
            <text:p>ENG301-L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14" office:value="19" office:value-type="string">
            <text:p>14</text:p>
          </table:table-cell>
          <table:table-cell calcext:value-type="float" office:string-value="14" office:value="19" office:value-type="string">
            <text:p>14</text:p>
          </table:table-cell>
          <table:table-cell calcext:value-type="float" office:string-value="9" office:value="6" office:value-type="string">
            <text:p>9</text:p>
          </table:table-cell>
          <table:table-cell calcext:value-type="string" office:string-value="ENG301-D" office:value-type="string">
            <text:p>ENG301-D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36" office:value="20" office:value-type="string">
            <text:p>36</text:p>
          </table:table-cell>
          <table:table-cell calcext:value-type="float" office:string-value="17" office:value="20" office:value-type="string">
            <text:p>17</text:p>
          </table:table-cell>
          <table:table-cell calcext:value-type="float" office:string-value="8" office:value="7" office:value-type="string">
            <text:p>8</text:p>
          </table:table-cell>
          <table:table-cell calcext:value-type="string" office:string-value="BDD401-K" office:value-type="string">
            <text:p>BDD401-K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15" office:value="21" office:value-type="string">
            <text:p>15</text:p>
          </table:table-cell>
          <table:table-cell calcext:value-type="float" office:string-value="15" office:value="1" office:value-type="string">
            <text:p>15</text:p>
          </table:table-cell>
          <table:table-cell calcext:value-type="float" office:string-value="2" office:value="8" office:value-type="string">
            <text:p>2</text:p>
          </table:table-cell>
          <table:table-cell calcext:value-type="string" office:string-value="EST301-C" office:value-type="string">
            <text:p>EST301-C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37" office:value="22" office:value-type="string">
            <text:p>37</text:p>
          </table:table-cell>
          <table:table-cell calcext:value-type="float" office:string-value="18" office:value="2" office:value-type="string">
            <text:p>18</text:p>
          </table:table-cell>
          <table:table-cell calcext:value-type="float" office:string-value="9" office:value="9" office:value-type="string">
            <text:p>9</text:p>
          </table:table-cell>
          <table:table-cell calcext:value-type="string" office:string-value="SO401-LM" office:value-type="string">
            <text:p>SO401-LM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16" office:value="23" office:value-type="string">
            <text:p>16</text:p>
          </table:table-cell>
          <table:table-cell calcext:value-type="float" office:string-value="16" office:value="3" office:value-type="string">
            <text:p>16</text:p>
          </table:table-cell>
          <table:table-cell calcext:value-type="float" office:string-value="3" office:value="10" office:value-type="string">
            <text:p>3</text:p>
          </table:table-cell>
          <table:table-cell calcext:value-type="string" office:string-value="ISW401-A" office:value-type="string">
            <text:p>ISW401-A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38" office:value="24" office:value-type="string">
            <text:p>38</text:p>
          </table:table-cell>
          <table:table-cell calcext:value-type="float" office:string-value="15" office:value="4" office:value-type="string">
            <text:p>15</text:p>
          </table:table-cell>
          <table:table-cell calcext:value-type="float" office:string-value="10" office:value="11" office:value-type="string">
            <text:p>10</text:p>
          </table:table-cell>
          <table:table-cell calcext:value-type="string" office:string-value="EST301-Z" office:value-type="string">
            <text:p>EST301-Z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17" office:value="25" office:value-type="string">
            <text:p>17</text:p>
          </table:table-cell>
          <table:table-cell calcext:value-type="float" office:string-value="17" office:value="5" office:value-type="string">
            <text:p>17</text:p>
          </table:table-cell>
          <table:table-cell calcext:value-type="float" office:string-value="4" office:value="12" office:value-type="string">
            <text:p>4</text:p>
          </table:table-cell>
          <table:table-cell calcext:value-type="string" office:string-value="BDD401-B" office:value-type="string">
            <text:p>BDD401-B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39" office:value="26" office:value-type="string">
            <text:p>39</text:p>
          </table:table-cell>
          <table:table-cell calcext:value-type="float" office:string-value="16" office:value="6" office:value-type="string">
            <text:p>16</text:p>
          </table:table-cell>
          <table:table-cell calcext:value-type="float" office:string-value="11" office:value="3" office:value-type="string">
            <text:p>11</text:p>
          </table:table-cell>
          <table:table-cell calcext:value-type="string" office:string-value="ISW401-D" office:value-type="string">
            <text:p>ISW401-D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18" office:value="27" office:value-type="string">
            <text:p>18</text:p>
          </table:table-cell>
          <table:table-cell calcext:value-type="float" office:string-value="18" office:value="7" office:value-type="string">
            <text:p>18</text:p>
          </table:table-cell>
          <table:table-cell calcext:value-type="float" office:string-value="5" office:value="2" office:value-type="string">
            <text:p>5</text:p>
          </table:table-cell>
          <table:table-cell calcext:value-type="string" office:string-value="SO401-C" office:value-type="string">
            <text:p>SO401-C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19" office:value="28" office:value-type="string">
            <text:p>19</text:p>
          </table:table-cell>
          <table:table-cell calcext:value-type="float" office:string-value="19" office:value="23" office:value-type="string">
            <text:p>19</text:p>
          </table:table-cell>
          <table:table-cell calcext:value-type="float" office:string-value="6" office:value="5" office:value-type="string">
            <text:p>6</text:p>
          </table:table-cell>
          <table:table-cell calcext:value-type="string" office:string-value="DSW401-D" office:value-type="string">
            <text:p>DSW401-D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1" office:value="29" office:value-type="string">
            <text:p>1</text:p>
          </table:table-cell>
          <table:table-cell calcext:value-type="float" office:string-value="1" office:value="21" office:value-type="string">
            <text:p>1</text:p>
          </table:table-cell>
          <table:table-cell calcext:value-type="float" office:string-value="3" office:value="4" office:value-type="string">
            <text:p>3</text:p>
          </table:table-cell>
          <table:table-cell calcext:value-type="string" office:string-value="FPR101-A" office:value-type="string">
            <text:p>FPR101-A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2" office:value="30" office:value-type="string">
            <text:p>2</text:p>
          </table:table-cell>
          <table:table-cell calcext:value-type="float" office:string-value="2" office:value="9" office:value-type="string">
            <text:p>2</text:p>
          </table:table-cell>
          <table:table-cell calcext:value-type="float" office:string-value="2" office:value="1" office:value-type="string">
            <text:p>2</text:p>
          </table:table-cell>
          <table:table-cell calcext:value-type="string" office:string-value="MAT101-A" office:value-type="string">
            <text:p>MAT101-A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3" office:value="31" office:value-type="string">
            <text:p>3</text:p>
          </table:table-cell>
          <table:table-cell calcext:value-type="float" office:string-value="3" office:value="11" office:value-type="string">
            <text:p>3</text:p>
          </table:table-cell>
          <table:table-cell calcext:value-type="float" office:string-value="5" office:value="2" office:value-type="string">
            <text:p>5</text:p>
          </table:table-cell>
          <table:table-cell calcext:value-type="string" office:string-value="LOG204-C" office:value-type="string">
            <text:p>LOG204-C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4" office:value="32" office:value-type="string">
            <text:p>4</text:p>
          </table:table-cell>
          <table:table-cell calcext:value-type="float" office:string-value="4" office:value="24" office:value-type="string">
            <text:p>4</text:p>
          </table:table-cell>
          <table:table-cell calcext:value-type="float" office:string-value="4" office:value="3" office:value-type="string">
            <text:p>4</text:p>
          </table:table-cell>
          <table:table-cell calcext:value-type="string" office:string-value="COM102-B" office:value-type="string">
            <text:p>COM102-B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5" office:value="33" office:value-type="string">
            <text:p>5</text:p>
          </table:table-cell>
          <table:table-cell calcext:value-type="float" office:string-value="5" office:value="12" office:value-type="string">
            <text:p>5</text:p>
          </table:table-cell>
          <table:table-cell calcext:value-type="float" office:string-value="1" office:value="4" office:value-type="string">
            <text:p>1</text:p>
          </table:table-cell>
          <table:table-cell calcext:value-type="string" office:string-value="ING202-F" office:value-type="string">
            <text:p>ING202-F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6" office:value="34" office:value-type="string">
            <text:p>6</text:p>
          </table:table-cell>
          <table:table-cell calcext:value-type="float" office:string-value="6" office:value="22" office:value-type="string">
            <text:p>6</text:p>
          </table:table-cell>
          <table:table-cell calcext:value-type="float" office:string-value="7" office:value="5" office:value-type="string">
            <text:p>7</text:p>
          </table:table-cell>
          <table:table-cell calcext:value-type="string" office:string-value="POO201-A" office:value-type="string">
            <text:p>POO201-A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7" office:value="35" office:value-type="string">
            <text:p>7</text:p>
          </table:table-cell>
          <table:table-cell calcext:value-type="float" office:string-value="7" office:value="14" office:value-type="string">
            <text:p>7</text:p>
          </table:table-cell>
          <table:table-cell calcext:value-type="float" office:string-value="10" office:value="6" office:value-type="string">
            <text:p>10</text:p>
          </table:table-cell>
          <table:table-cell calcext:value-type="string" office:string-value="CAL201-B" office:value-type="string">
            <text:p>CAL201-B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8" office:value="36" office:value-type="string">
            <text:p>8</text:p>
          </table:table-cell>
          <table:table-cell calcext:value-type="float" office:string-value="8" office:value="17" office:value-type="string">
            <text:p>8</text:p>
          </table:table-cell>
          <table:table-cell calcext:value-type="float" office:string-value="14" office:value="8" office:value-type="string">
            <text:p>14</text:p>
          </table:table-cell>
          <table:table-cell calcext:value-type="string" office:string-value="ARG201-C" office:value-type="string">
            <text:p>ARG201-C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9" office:value="37" office:value-type="string">
            <text:p>9</text:p>
          </table:table-cell>
          <table:table-cell calcext:value-type="float" office:string-value="9" office:value="18" office:value-type="string">
            <text:p>9</text:p>
          </table:table-cell>
          <table:table-cell calcext:value-type="float" office:string-value="8" office:value="9" office:value-type="string">
            <text:p>8</text:p>
          </table:table-cell>
          <table:table-cell calcext:value-type="string" office:string-value="ENG201-A" office:value-type="string">
            <text:p>ENG201-A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40" office:value="38" office:value-type="string">
            <text:p>40</text:p>
          </table:table-cell>
          <table:table-cell calcext:value-type="float" office:string-value="20" office:value="15" office:value-type="string">
            <text:p>20</text:p>
          </table:table-cell>
          <table:table-cell calcext:value-type="float" office:string-value="12" office:value="10" office:value-type="string">
            <text:p>12</text:p>
          </table:table-cell>
          <table:table-cell calcext:value-type="string" office:string-value="RED401-V" office:value-type="string">
            <text:p>RED401-V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20" office:value="39" office:value-type="string">
            <text:p>20</text:p>
          </table:table-cell>
          <table:table-cell calcext:value-type="float" office:string-value="20" office:value="16" office:value-type="string">
            <text:p>20</text:p>
          </table:table-cell>
          <table:table-cell calcext:value-type="float" office:string-value="7" office:value="11" office:value-type="string">
            <text:p>7</text:p>
          </table:table-cell>
          <table:table-cell calcext:value-type="string" office:string-value="RED401-E" office:value-type="string">
            <text:p>RED401-E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calcext:value-type="float" office:string-value="21" office:value="40" office:value-type="string">
            <text:p>21</text:p>
          </table:table-cell>
          <table:table-cell calcext:value-type="float" office:string-value="1" office:value="20" office:value-type="string">
            <text:p>1</text:p>
          </table:table-cell>
          <table:table-cell calcext:value-type="float" office:string-value="8" office:value="12" office:value-type="string">
            <text:p>8</text:p>
          </table:table-cell>
          <table:table-cell calcext:value-type="string" office:string-value="FPR101-C" office:value-type="string">
            <text:p>FPR101-C</text:p>
          </table:table-cell>
          <table:table-cell calcext:value-type="float" office:string-value="30" office:value="30" office:value-type="string">
            <text:p>30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GroupSchedule" table:style-name="ta1">
        <table:table-column table:default-cell-style-name="ce8" table:style-name="co9"/>
        <table:table-column table:default-cell-style-name="ce8" table:number-columns-repeated="2" table:style-name="co1"/>
        <table:table-column table:default-cell-style-name="ce10" table:style-name="co10"/>
        <table:table-column table:default-cell-style-name="ce10" table:style-name="co4"/>
        <table:table-column table:default-cell-style-name="ce8" table:style-name="co9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 table:style-name="ce8">
            <text:p>startTime</text:p>
          </table:table-cell>
          <table:table-cell calcext:value-type="string" office:value-type="string" table:style-name="ce8">
            <text:p>endTime</text:p>
          </table:table-cell>
          <table:table-cell calcext:value-type="string" office:value-type="string">
            <text:p>classroom</text:p>
          </table:table-cell>
        </table:table-row>
        <table:table-row table:style-name="ro1">
          <table:table-cell calcext:value-type="float" office:string-value="44" office:value="1" office:value-type="string">
            <text:p>44</text:p>
          </table:table-cell>
          <table:table-cell calcext:value-type="float" office:string-value="29" office:value="1" office:value-type="string">
            <text:p>29</text:p>
          </table:table-cell>
          <table:table-cell calcext:value-type="string" office:string-value="MARTES" office:value-type="string">
            <text:p>MARTES</text:p>
          </table:table-cell>
          <table:table-cell calcext:value-type="time" office:string-value="06:00:00 PM" office:time-value="PT08H00M00S" office:value-type="string">
            <text:p>06:00:00 PM</text:p>
          </table:table-cell>
          <table:table-cell calcext:value-type="time" office:string-value="08:00:00 PM" office:time-value="PT10H00M00S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 table:style-name="ro1">
          <table:table-cell calcext:value-type="float" office:string-value="45" office:value="2" office:value-type="string">
            <text:p>45</text:p>
          </table:table-cell>
          <table:table-cell calcext:value-type="float" office:string-value="30" office:value="1" office:value-type="string">
            <text:p>30</text:p>
          </table:table-cell>
          <table:table-cell calcext:value-type="string" office:string-value="MIERCOLES" office:value-type="string">
            <text:p>MIERCOLES</text:p>
          </table:table-cell>
          <table:table-cell calcext:value-type="time" office:string-value="05:00:00 PM" office:time-value="PT08H00M00S" office:value-type="string">
            <text:p>05:00:00 PM</text:p>
          </table:table-cell>
          <table:table-cell calcext:value-type="time" office:string-value="09:00:00 PM" office:time-value="PT10H00M00S" office:value-type="string">
            <text:p>09:00:00 PM</text:p>
          </table:table-cell>
          <table:table-cell calcext:value-type="string" office:string-value="F601" office:value-type="string">
            <text:p>F601</text:p>
          </table:table-cell>
        </table:table-row>
        <table:table-row table:style-name="ro1">
          <table:table-cell calcext:value-type="float" office:string-value="46" office:value="3" office:value-type="string">
            <text:p>46</text:p>
          </table:table-cell>
          <table:table-cell calcext:value-type="float" office:string-value="31" office:value="2" office:value-type="string">
            <text:p>31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08:00:00 AM" office:time-value="PT32H00M00S" office:value-type="string">
            <text:p>08:00:00 AM</text:p>
          </table:table-cell>
          <table:table-cell calcext:value-type="time" office:string-value="10:00:00 AM" office:time-value="PT34H00M00S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 table:style-name="ro1">
          <table:table-cell calcext:value-type="float" office:string-value="47" office:value="4" office:value-type="string">
            <text:p>47</text:p>
          </table:table-cell>
          <table:table-cell calcext:value-type="float" office:string-value="31" office:value="2" office:value-type="string">
            <text:p>31</text:p>
          </table:table-cell>
          <table:table-cell calcext:value-type="string" office:string-value="MIERCOLES" office:value-type="string">
            <text:p>MIERCOLES</text:p>
          </table:table-cell>
          <table:table-cell calcext:value-type="time" office:string-value="08:00:00 AM" office:time-value="PT56H00M00S" office:value-type="string">
            <text:p>08:00:00 AM</text:p>
          </table:table-cell>
          <table:table-cell calcext:value-type="time" office:string-value="10:00:00 AM" office:time-value="PT58H00M00S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 table:style-name="ro1">
          <table:table-cell calcext:value-type="float" office:string-value="48" office:value="5" office:value-type="string">
            <text:p>48</text:p>
          </table:table-cell>
          <table:table-cell calcext:value-type="float" office:string-value="32" office:value="3" office:value-type="string">
            <text:p>32</text:p>
          </table:table-cell>
          <table:table-cell calcext:value-type="string" office:string-value="MARTES" office:value-type="string">
            <text:p>MARTES</text:p>
          </table:table-cell>
          <table:table-cell calcext:value-type="time" office:string-value="08:00:00 AM" office:time-value="PT80H00M00S" office:value-type="string">
            <text:p>08:00:00 AM</text:p>
          </table:table-cell>
          <table:table-cell calcext:value-type="time" office:string-value="10:00:00 AM" office:time-value="PT11H00M00S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 table:style-name="ro1">
          <table:table-cell calcext:value-type="float" office:string-value="49" office:value="6" office:value-type="string">
            <text:p>49</text:p>
          </table:table-cell>
          <table:table-cell calcext:value-type="float" office:string-value="32" office:value="4" office:value-type="string">
            <text:p>32</text:p>
          </table:table-cell>
          <table:table-cell calcext:value-type="string" office:string-value="JUEVES" office:value-type="string">
            <text:p>JUEVES</text:p>
          </table:table-cell>
          <table:table-cell calcext:value-type="time" office:string-value="08:00:00 AM" office:time-value="PT10H00M00S" office:value-type="string">
            <text:p>08:00:00 AM</text:p>
          </table:table-cell>
          <table:table-cell calcext:value-type="time" office:string-value="10:00:00 AM" office:time-value="PT12H00M00S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 table:style-name="ro1">
          <table:table-cell calcext:value-type="float" office:string-value="50" office:value="7" office:value-type="string">
            <text:p>50</text:p>
          </table:table-cell>
          <table:table-cell calcext:value-type="float" office:string-value="33" office:value="5" office:value-type="string">
            <text:p>33</text:p>
          </table:table-cell>
          <table:table-cell calcext:value-type="string" office:string-value="VIERNES" office:value-type="string">
            <text:p>VIERNES</text:p>
          </table:table-cell>
          <table:table-cell calcext:value-type="time" office:string-value="08:00:00 AM" office:time-value="PT10H00M00S" office:value-type="string">
            <text:p>08:00:00 AM</text:p>
          </table:table-cell>
          <table:table-cell calcext:value-type="time" office:string-value="11:00:00 AM" office:time-value="PT12H00M00S" office:value-type="string">
            <text:p>11:00:00 AM</text:p>
          </table:table-cell>
          <table:table-cell calcext:value-type="string" office:string-value="G601" office:value-type="string">
            <text:p>G601</text:p>
          </table:table-cell>
        </table:table-row>
        <table:table-row table:style-name="ro1">
          <table:table-cell calcext:value-type="float" office:string-value="51" office:value="8" office:value-type="string">
            <text:p>51</text:p>
          </table:table-cell>
          <table:table-cell calcext:value-type="float" office:string-value="34" office:value="6" office:value-type="string">
            <text:p>34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10:00:00 AM" office:time-value="PT08H00M00S" office:value-type="string">
            <text:p>10:00:00 AM</text:p>
          </table:table-cell>
          <table:table-cell calcext:value-type="time" office:string-value="12:00:00 PM" office:time-value="PT10H00M00S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 table:style-name="ro1">
          <table:table-cell calcext:value-type="float" office:string-value="52" office:value="9" office:value-type="string">
            <text:p>52</text:p>
          </table:table-cell>
          <table:table-cell calcext:value-type="float" office:string-value="35" office:value="6" office:value-type="string">
            <text:p>35</text:p>
          </table:table-cell>
          <table:table-cell calcext:value-type="string" office:string-value="MIERCOLES" office:value-type="string">
            <text:p>MIERCOLES</text:p>
          </table:table-cell>
          <table:table-cell calcext:value-type="time" office:string-value="10:00:00 AM" office:time-value="PT10H00M00S" office:value-type="string">
            <text:p>10:00:00 AM</text:p>
          </table:table-cell>
          <table:table-cell calcext:value-type="time" office:string-value="12:00:00 PM" office:time-value="PT12H00M00S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 table:style-name="ro1">
          <table:table-cell calcext:value-type="float" office:string-value="53" office:value="10" office:value-type="string">
            <text:p>53</text:p>
          </table:table-cell>
          <table:table-cell calcext:value-type="float" office:string-value="36" office:value="7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05:00:00 PM" office:time-value="PT08H00M00S" office:value-type="string">
            <text:p>05:00:00 PM</text:p>
          </table:table-cell>
          <table:table-cell calcext:value-type="time" office:string-value="08:00:00 PM" office:time-value="PT10H00M00S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 table:style-name="ro1">
          <table:table-cell calcext:value-type="float" office:string-value="10" office:value="11" office:value-type="string">
            <text:p>10</text:p>
          </table:table-cell>
          <table:table-cell calcext:value-type="float" office:string-value="7" office:value="7" office:value-type="string">
            <text:p>7</text:p>
          </table:table-cell>
          <table:table-cell calcext:value-type="string" office:string-value="JUEVES" office:value-type="string">
            <text:p>JUEVES</text:p>
          </table:table-cell>
          <table:table-cell calcext:value-type="time" office:string-value="08:00:00 AM" office:time-value="PT10H00M00S" office:value-type="string">
            <text:p>08:00:00 AM</text:p>
          </table:table-cell>
          <table:table-cell calcext:value-type="time" office:string-value="10:00:00 AM" office:time-value="PT12H00M00S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 table:style-name="ro1">
          <table:table-cell calcext:value-type="float" office:string-value="54" office:value="12" office:value-type="string">
            <text:p>54</text:p>
          </table:table-cell>
          <table:table-cell calcext:value-type="float" office:string-value="36" office:value="8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07:00:00 PM" office:time-value="PT10H00M00S" office:value-type="string">
            <text:p>07:00:00 PM</text:p>
          </table:table-cell>
          <table:table-cell calcext:value-type="time" office:string-value="10:00:00 PM" office:time-value="PT12H00M00S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 table:style-name="ro1">
          <table:table-cell calcext:value-type="float" office:string-value="11" office:value="13" office:value-type="string">
            <text:p>11</text:p>
          </table:table-cell>
          <table:table-cell calcext:value-type="float" office:string-value="7" office:value="8" office:value-type="string">
            <text:p>7</text:p>
          </table:table-cell>
          <table:table-cell calcext:value-type="string" office:string-value="VIERNES" office:value-type="string">
            <text:p>VIERNES</text:p>
          </table:table-cell>
          <table:table-cell calcext:value-type="time" office:string-value="10:00:00 AM" office:time-value="PT08H00M00S" office:value-type="string">
            <text:p>10:00:00 AM</text:p>
          </table:table-cell>
          <table:table-cell calcext:value-type="time" office:string-value="12:00:00 PM" office:time-value="PT10H00M00S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 table:style-name="ro1">
          <table:table-cell calcext:value-type="float" office:string-value="55" office:value="14" office:value-type="string">
            <text:p>55</text:p>
          </table:table-cell>
          <table:table-cell calcext:value-type="float" office:string-value="37" office:value="9" office:value-type="string">
            <text:p>37</text:p>
          </table:table-cell>
          <table:table-cell calcext:value-type="string" office:string-value="JUEVES" office:value-type="string">
            <text:p>JUEVES</text:p>
          </table:table-cell>
          <table:table-cell calcext:value-type="time" office:string-value="05:00:00 PM" office:time-value="PT07H00M00S" office:value-type="string">
            <text:p>05:00:00 PM</text:p>
          </table:table-cell>
          <table:table-cell calcext:value-type="time" office:string-value="08:00:00 PM" office:time-value="PT10H00M00S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 table:style-name="ro1">
          <table:table-cell calcext:value-type="float" office:string-value="12" office:value="15" office:value-type="string">
            <text:p>12</text:p>
          </table:table-cell>
          <table:table-cell calcext:value-type="float" office:string-value="8" office:value="10" office:value-type="string">
            <text:p>8</text:p>
          </table:table-cell>
          <table:table-cell calcext:value-type="string" office:string-value="JUEVES" office:value-type="string">
            <text:p>JUEVES</text:p>
          </table:table-cell>
          <table:table-cell calcext:value-type="time" office:string-value="10:00:00 AM" office:time-value="PT08H00M00S" office:value-type="string">
            <text:p>10:00:00 AM</text:p>
          </table:table-cell>
          <table:table-cell calcext:value-type="time" office:string-value="12:00:00 PM" office:time-value="PT11H00M00S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 table:style-name="ro1">
          <table:table-cell calcext:value-type="float" office:string-value="56" office:value="16" office:value-type="string">
            <text:p>56</text:p>
          </table:table-cell>
          <table:table-cell calcext:value-type="float" office:string-value="37" office:value="11" office:value-type="string">
            <text:p>37</text:p>
          </table:table-cell>
          <table:table-cell calcext:value-type="string" office:string-value="VIERNES" office:value-type="string">
            <text:p>VIERNES</text:p>
          </table:table-cell>
          <table:table-cell calcext:value-type="time" office:string-value="07:00:00 PM" office:time-value="PT08H00M00S" office:value-type="string">
            <text:p>07:00:00 PM</text:p>
          </table:table-cell>
          <table:table-cell calcext:value-type="time" office:string-value="10:00:00 PM" office:time-value="PT10H00M00S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 table:style-name="ro1">
          <table:table-cell calcext:value-type="float" office:string-value="13" office:value="17" office:value-type="string">
            <text:p>13</text:p>
          </table:table-cell>
          <table:table-cell calcext:value-type="float" office:string-value="8" office:value="11" office:value-type="string">
            <text:p>8</text:p>
          </table:table-cell>
          <table:table-cell calcext:value-type="string" office:string-value="VIERNES" office:value-type="string">
            <text:p>VIERNES</text:p>
          </table:table-cell>
          <table:table-cell calcext:value-type="time" office:string-value="08:00:00 AM" office:time-value="PT08H00M00S" office:value-type="string">
            <text:p>08:00:00 AM</text:p>
          </table:table-cell>
          <table:table-cell calcext:value-type="time" office:string-value="10:00:00 AM" office:time-value="PT10H00M00S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 table:style-name="ro1">
          <table:table-cell calcext:value-type="float" office:string-value="57" office:value="18" office:value-type="string">
            <text:p>57</text:p>
          </table:table-cell>
          <table:table-cell calcext:value-type="float" office:string-value="38" office:value="12" office:value-type="string">
            <text:p>38</text:p>
          </table:table-cell>
          <table:table-cell calcext:value-type="string" office:string-value="JUEVES" office:value-type="string">
            <text:p>JUEVES</text:p>
          </table:table-cell>
          <table:table-cell calcext:value-type="time" office:string-value="07:00:00 PM" office:time-value="PT32H00M00S" office:value-type="string">
            <text:p>07:00:00 PM</text:p>
          </table:table-cell>
          <table:table-cell calcext:value-type="time" office:string-value="10:00:00 PM" office:time-value="PT34H00M00S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 table:style-name="ro1">
          <table:table-cell calcext:value-type="float" office:string-value="14" office:value="19" office:value-type="string">
            <text:p>14</text:p>
          </table:table-cell>
          <table:table-cell calcext:value-type="float" office:string-value="9" office:value="12" office:value-type="string">
            <text:p>9</text:p>
          </table:table-cell>
          <table:table-cell calcext:value-type="string" office:string-value="MARTES" office:value-type="string">
            <text:p>MARTES</text:p>
          </table:table-cell>
          <table:table-cell calcext:value-type="time" office:string-value="07:00:00 AM" office:time-value="PT56H00M00S" office:value-type="string">
            <text:p>07:00:00 AM</text:p>
          </table:table-cell>
          <table:table-cell calcext:value-type="time" office:string-value="10:00:00 AM" office:time-value="PT58H00M00S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 table:style-name="ro1">
          <table:table-cell calcext:value-type="float" office:string-value="58" office:value="20" office:value-type="string">
            <text:p>58</text:p>
          </table:table-cell>
          <table:table-cell calcext:value-type="float" office:string-value="38" office:value="13" office:value-type="string">
            <text:p>38</text:p>
          </table:table-cell>
          <table:table-cell calcext:value-type="string" office:string-value="VIERNES" office:value-type="string">
            <text:p>VIERNES</text:p>
          </table:table-cell>
          <table:table-cell calcext:value-type="time" office:string-value="05:00:00 PM" office:time-value="PT80H00M00S" office:value-type="string">
            <text:p>05:00:00 PM</text:p>
          </table:table-cell>
          <table:table-cell calcext:value-type="time" office:string-value="08:00:00 PM" office:time-value="PT11H00M00S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 table:style-name="ro1">
          <table:table-cell calcext:value-type="float" office:string-value="15" office:value="21" office:value-type="string">
            <text:p>15</text:p>
          </table:table-cell>
          <table:table-cell calcext:value-type="float" office:string-value="10" office:value="14" office:value-type="string">
            <text:p>10</text:p>
          </table:table-cell>
          <table:table-cell calcext:value-type="string" office:string-value="MIERCOLES" office:value-type="string">
            <text:p>MIERCOLES</text:p>
          </table:table-cell>
          <table:table-cell calcext:value-type="time" office:string-value="08:00:00 AM" office:time-value="PT10H00M00S" office:value-type="string">
            <text:p>08:00:00 AM</text:p>
          </table:table-cell>
          <table:table-cell calcext:value-type="time" office:string-value="11:00:00 AM" office:time-value="PT12H00M00S" office:value-type="string">
            <text:p>11:00:00 AM</text:p>
          </table:table-cell>
          <table:table-cell calcext:value-type="string" office:string-value="B201" office:value-type="string">
            <text:p>B201</text:p>
          </table:table-cell>
        </table:table-row>
        <table:table-row table:style-name="ro1">
          <table:table-cell calcext:value-type="float" office:string-value="59" office:value="22" office:value-type="string">
            <text:p>59</text:p>
          </table:table-cell>
          <table:table-cell calcext:value-type="float" office:string-value="39" office:value="15" office:value-type="string">
            <text:p>39</text:p>
          </table:table-cell>
          <table:table-cell calcext:value-type="string" office:string-value="MARTES" office:value-type="string">
            <text:p>MARTES</text:p>
          </table:table-cell>
          <table:table-cell calcext:value-type="time" office:string-value="06:00:00 PM" office:time-value="PT10H00M00S" office:value-type="string">
            <text:p>06:00:00 PM</text:p>
          </table:table-cell>
          <table:table-cell calcext:value-type="time" office:string-value="08:00:00 PM" office:time-value="PT12H00M00S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 table:style-name="ro1">
          <table:table-cell calcext:value-type="float" office:string-value="16" office:value="23" office:value-type="string">
            <text:p>16</text:p>
          </table:table-cell>
          <table:table-cell calcext:value-type="float" office:string-value="11" office:value="16" office:value-type="string">
            <text:p>11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08:00:00 AM" office:time-value="PT08H00M00S" office:value-type="string">
            <text:p>08:00:00 AM</text:p>
          </table:table-cell>
          <table:table-cell calcext:value-type="time" office:string-value="10:00:00 AM" office:time-value="PT10H00M00S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 table:style-name="ro1">
          <table:table-cell calcext:value-type="float" office:string-value="17" office:value="24" office:value-type="string">
            <text:p>17</text:p>
          </table:table-cell>
          <table:table-cell calcext:value-type="float" office:string-value="11" office:value="16" office:value-type="string">
            <text:p>11</text:p>
          </table:table-cell>
          <table:table-cell calcext:value-type="string" office:string-value="MIERCOLES" office:value-type="string">
            <text:p>MIERCOLES</text:p>
          </table:table-cell>
          <table:table-cell calcext:value-type="time" office:string-value="08:00:00 AM" office:time-value="PT10H00M00S" office:value-type="string">
            <text:p>08:00:00 AM</text:p>
          </table:table-cell>
          <table:table-cell calcext:value-type="time" office:string-value="10:00:00 AM" office:time-value="PT12H00M00S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 table:style-name="ro1">
          <table:table-cell calcext:value-type="float" office:string-value="18" office:value="25" office:value-type="string">
            <text:p>18</text:p>
          </table:table-cell>
          <table:table-cell calcext:value-type="float" office:string-value="12" office:value="17" office:value-type="string">
            <text:p>12</text:p>
          </table:table-cell>
          <table:table-cell calcext:value-type="string" office:string-value="MARTES" office:value-type="string">
            <text:p>MARTES</text:p>
          </table:table-cell>
          <table:table-cell calcext:value-type="time" office:string-value="08:00:00 AM" office:time-value="PT08H00M00S" office:value-type="string">
            <text:p>08:00:00 AM</text:p>
          </table:table-cell>
          <table:table-cell calcext:value-type="time" office:string-value="10:00:00 AM" office:time-value="PT10H00M00S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 table:style-name="ro1">
          <table:table-cell calcext:value-type="float" office:string-value="19" office:value="26" office:value-type="string">
            <text:p>19</text:p>
          </table:table-cell>
          <table:table-cell calcext:value-type="float" office:string-value="12" office:value="17" office:value-type="string">
            <text:p>12</text:p>
          </table:table-cell>
          <table:table-cell calcext:value-type="string" office:string-value="JUEVES" office:value-type="string">
            <text:p>JUEVES</text:p>
          </table:table-cell>
          <table:table-cell calcext:value-type="time" office:string-value="08:00:00 AM" office:time-value="PT10H00M00S" office:value-type="string">
            <text:p>08:00:00 AM</text:p>
          </table:table-cell>
          <table:table-cell calcext:value-type="time" office:string-value="10:00:00 AM" office:time-value="PT12H00M00S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 table:style-name="ro1">
          <table:table-cell calcext:value-type="float" office:string-value="1" office:value="27" office:value-type="string">
            <text:p>1</text:p>
          </table:table-cell>
          <table:table-cell calcext:value-type="float" office:string-value="1" office:value="18" office:value-type="string">
            <text:p>1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08:00:00 AM" office:time-value="PT10H00M00S" office:value-type="string">
            <text:p>08:00:00 AM</text:p>
          </table:table-cell>
          <table:table-cell calcext:value-type="time" office:string-value="10:00:00 AM" office:time-value="PT12H00M00S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 table:style-name="ro1">
          <table:table-cell calcext:value-type="float" office:string-value="2" office:value="28" office:value-type="string">
            <text:p>2</text:p>
          </table:table-cell>
          <table:table-cell calcext:value-type="float" office:string-value="1" office:value="18" office:value-type="string">
            <text:p>1</text:p>
          </table:table-cell>
          <table:table-cell calcext:value-type="string" office:string-value="MIERCOLES" office:value-type="string">
            <text:p>MIERCOLES</text:p>
          </table:table-cell>
          <table:table-cell calcext:value-type="time" office:string-value="08:00:00 AM" office:time-value="PT08H00M00S" office:value-type="string">
            <text:p>08:00:00 AM</text:p>
          </table:table-cell>
          <table:table-cell calcext:value-type="time" office:string-value="10:00:00 AM" office:time-value="PT10H00M00S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 table:style-name="ro1">
          <table:table-cell calcext:value-type="float" office:string-value="3" office:value="29" office:value-type="string">
            <text:p>3</text:p>
          </table:table-cell>
          <table:table-cell calcext:value-type="float" office:string-value="2" office:value="19" office:value-type="string">
            <text:p>2</text:p>
          </table:table-cell>
          <table:table-cell calcext:value-type="string" office:string-value="MARTES" office:value-type="string">
            <text:p>MARTES</text:p>
          </table:table-cell>
          <table:table-cell calcext:value-type="time" office:string-value="08:00:00 AM" office:time-value="PT07H00M00S" office:value-type="string">
            <text:p>08:00:00 AM</text:p>
          </table:table-cell>
          <table:table-cell calcext:value-type="time" office:string-value="10:00:00 AM" office:time-value="PT10H00M00S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 table:style-name="ro1">
          <table:table-cell calcext:value-type="float" office:string-value="4" office:value="30" office:value-type="string">
            <text:p>4</text:p>
          </table:table-cell>
          <table:table-cell calcext:value-type="float" office:string-value="2" office:value="20" office:value-type="string">
            <text:p>2</text:p>
          </table:table-cell>
          <table:table-cell calcext:value-type="string" office:string-value="JUEVES" office:value-type="string">
            <text:p>JUEVES</text:p>
          </table:table-cell>
          <table:table-cell calcext:value-type="time" office:string-value="08:00:00 AM" office:time-value="PT17H00M00S" office:value-type="string">
            <text:p>08:00:00 AM</text:p>
          </table:table-cell>
          <table:table-cell calcext:value-type="time" office:string-value="10:00:00 AM" office:time-value="PT20H00M00S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 table:style-name="ro1">
          <table:table-cell calcext:value-type="float" office:string-value="5" office:value="31" office:value-type="string">
            <text:p>5</text:p>
          </table:table-cell>
          <table:table-cell calcext:value-type="float" office:string-value="3" office:value="22" office:value-type="string">
            <text:p>3</text:p>
          </table:table-cell>
          <table:table-cell calcext:value-type="string" office:string-value="VIERNES" office:value-type="string">
            <text:p>VIERNES</text:p>
          </table:table-cell>
          <table:table-cell calcext:value-type="time" office:string-value="08:00:00 AM" office:time-value="PT17H00M00S" office:value-type="string">
            <text:p>08:00:00 AM</text:p>
          </table:table-cell>
          <table:table-cell calcext:value-type="time" office:string-value="11:00:00 AM" office:time-value="PT20H00M00S" office:value-type="string">
            <text:p>11:00:00 AM</text:p>
          </table:table-cell>
          <table:table-cell calcext:value-type="string" office:string-value="A103" office:value-type="string">
            <text:p>A103</text:p>
          </table:table-cell>
        </table:table-row>
        <table:table-row table:style-name="ro1">
          <table:table-cell calcext:value-type="float" office:string-value="6" office:value="32" office:value-type="string">
            <text:p>6</text:p>
          </table:table-cell>
          <table:table-cell calcext:value-type="float" office:string-value="4" office:value="22" office:value-type="string">
            <text:p>4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10:00:00 AM" office:time-value="PT17H00M00S" office:value-type="string">
            <text:p>10:00:00 AM</text:p>
          </table:table-cell>
          <table:table-cell calcext:value-type="time" office:string-value="12:00:00 PM" office:time-value="PT20H00M00S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 table:style-name="ro1">
          <table:table-cell calcext:value-type="float" office:string-value="7" office:value="33" office:value-type="string">
            <text:p>7</text:p>
          </table:table-cell>
          <table:table-cell calcext:value-type="float" office:string-value="5" office:value="21" office:value-type="string">
            <text:p>5</text:p>
          </table:table-cell>
          <table:table-cell calcext:value-type="string" office:string-value="MIERCOLES" office:value-type="string">
            <text:p>MIERCOLES</text:p>
          </table:table-cell>
          <table:table-cell calcext:value-type="time" office:string-value="10:00:00 AM" office:time-value="PT17H00M00S" office:value-type="string">
            <text:p>10:00:00 AM</text:p>
          </table:table-cell>
          <table:table-cell calcext:value-type="time" office:string-value="12:00:00 PM" office:time-value="PT21H00M00S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 table:style-name="ro1">
          <table:table-cell calcext:value-type="float" office:string-value="8" office:value="34" office:value-type="string">
            <text:p>8</text:p>
          </table:table-cell>
          <table:table-cell calcext:value-type="float" office:string-value="6" office:value="21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08:00:00 AM" office:time-value="PT17H00M00S" office:value-type="string">
            <text:p>08:00:00 AM</text:p>
          </table:table-cell>
          <table:table-cell calcext:value-type="time" office:string-value="10:00:00 AM" office:time-value="PT20H00M00S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 table:style-name="ro1">
          <table:table-cell calcext:value-type="float" office:string-value="9" office:value="35" office:value-type="string">
            <text:p>9</text:p>
          </table:table-cell>
          <table:table-cell calcext:value-type="float" office:string-value="6" office:value="24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10:00:00 AM" office:time-value="PT17H00M00S" office:value-type="string">
            <text:p>10:00:00 AM</text:p>
          </table:table-cell>
          <table:table-cell calcext:value-type="time" office:string-value="12:00:00 PM" office:time-value="PT21H00M00S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 table:style-name="ro1">
          <table:table-cell calcext:value-type="float" office:string-value="60" office:value="36" office:value-type="string">
            <text:p>60</text:p>
          </table:table-cell>
          <table:table-cell calcext:value-type="float" office:string-value="40" office:value="25" office:value-type="string">
            <text:p>40</text:p>
          </table:table-cell>
          <table:table-cell calcext:value-type="string" office:string-value="MIERCOLES" office:value-type="string">
            <text:p>MIERCOLES</text:p>
          </table:table-cell>
          <table:table-cell calcext:value-type="time" office:string-value="05:00:00 PM" office:time-value="PT19H00M00S" office:value-type="string">
            <text:p>05:00:00 PM</text:p>
          </table:table-cell>
          <table:table-cell calcext:value-type="time" office:string-value="09:00:00 PM" office:time-value="PT22H00M00S" office:value-type="string">
            <text:p>09:00:00 PM</text:p>
          </table:table-cell>
          <table:table-cell calcext:value-type="string" office:string-value="F401" office:value-type="string">
            <text:p>F401</text:p>
          </table:table-cell>
        </table:table-row>
        <table:table-row table:style-name="ro1">
          <table:table-cell calcext:value-type="float" office:string-value="20" office:value="37" office:value-type="string">
            <text:p>20</text:p>
          </table:table-cell>
          <table:table-cell calcext:value-type="float" office:string-value="13" office:value="23" office:value-type="string">
            <text:p>13</text:p>
          </table:table-cell>
          <table:table-cell calcext:value-type="string" office:string-value="VIERNES" office:value-type="string">
            <text:p>VIERNES</text:p>
          </table:table-cell>
          <table:table-cell calcext:value-type="time" office:string-value="08:00:00 AM" office:time-value="PT19H00M00S" office:value-type="string">
            <text:p>08:00:00 AM</text:p>
          </table:table-cell>
          <table:table-cell calcext:value-type="time" office:string-value="11:00:00 AM" office:time-value="PT22H00M00S" office:value-type="string">
            <text:p>11:00:00 AM</text:p>
          </table:table-cell>
          <table:table-cell calcext:value-type="string" office:string-value="C301" office:value-type="string">
            <text:p>C301</text:p>
          </table:table-cell>
        </table:table-row>
        <table:table-row table:style-name="ro1">
          <table:table-cell calcext:value-type="float" office:string-value="21" office:value="38" office:value-type="string">
            <text:p>21</text:p>
          </table:table-cell>
          <table:table-cell calcext:value-type="float" office:string-value="14" office:value="26" office:value-type="string">
            <text:p>14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10:00:00 AM" office:time-value="PT17H00M00S" office:value-type="string">
            <text:p>10:00:00 AM</text:p>
          </table:table-cell>
          <table:table-cell calcext:value-type="time" office:string-value="12:00:00 PM" office:time-value="PT20H00M00S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 table:style-name="ro1">
          <table:table-cell calcext:value-type="float" office:string-value="22" office:value="39" office:value-type="string">
            <text:p>22</text:p>
          </table:table-cell>
          <table:table-cell calcext:value-type="float" office:string-value="15" office:value="26" office:value-type="string">
            <text:p>15</text:p>
          </table:table-cell>
          <table:table-cell calcext:value-type="string" office:string-value="MIERCOLES" office:value-type="string">
            <text:p>MIERCOLES</text:p>
          </table:table-cell>
          <table:table-cell calcext:value-type="time" office:string-value="10:00:00 AM" office:time-value="PT19H00M00S" office:value-type="string">
            <text:p>10:00:00 AM</text:p>
          </table:table-cell>
          <table:table-cell calcext:value-type="time" office:string-value="12:00:00 PM" office:time-value="PT22H00M00S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 table:style-name="ro1">
          <table:table-cell calcext:value-type="float" office:string-value="23" office:value="40" office:value-type="string">
            <text:p>23</text:p>
          </table:table-cell>
          <table:table-cell calcext:value-type="float" office:string-value="16" office:value="27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08:00:00 AM" office:time-value="PT17H00M00S" office:value-type="string">
            <text:p>08:00:00 AM</text:p>
          </table:table-cell>
          <table:table-cell calcext:value-type="time" office:string-value="10:00:00 AM" office:time-value="PT20H00M00S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 table:style-name="ro1">
          <table:table-cell calcext:value-type="float" office:string-value="24" office:value="41" office:value-type="string">
            <text:p>24</text:p>
          </table:table-cell>
          <table:table-cell calcext:value-type="float" office:string-value="16" office:value="27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10:00:00 AM" office:time-value="PT19H00M00S" office:value-type="string">
            <text:p>10:00:00 AM</text:p>
          </table:table-cell>
          <table:table-cell calcext:value-type="time" office:string-value="12:00:00 PM" office:time-value="PT22H00M00S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 table:style-name="ro1">
          <table:table-cell calcext:value-type="float" office:string-value="25" office:value="42" office:value-type="string">
            <text:p>25</text:p>
          </table:table-cell>
          <table:table-cell calcext:value-type="float" office:string-value="17" office:value="28" office:value-type="string">
            <text:p>17</text:p>
          </table:table-cell>
          <table:table-cell calcext:value-type="string" office:string-value="JUEVES" office:value-type="string">
            <text:p>JUEVES</text:p>
          </table:table-cell>
          <table:table-cell calcext:value-type="time" office:string-value="08:00:00 AM" office:time-value="PT19H00M00S" office:value-type="string">
            <text:p>08:00:00 AM</text:p>
          </table:table-cell>
          <table:table-cell calcext:value-type="time" office:string-value="10:00:00 AM" office:time-value="PT22H00M00S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 table:style-name="ro1">
          <table:table-cell calcext:value-type="float" office:string-value="26" office:value="43" office:value-type="string">
            <text:p>26</text:p>
          </table:table-cell>
          <table:table-cell calcext:value-type="float" office:string-value="17" office:value="28" office:value-type="string">
            <text:p>17</text:p>
          </table:table-cell>
          <table:table-cell calcext:value-type="string" office:string-value="VIERNES" office:value-type="string">
            <text:p>VIERNES</text:p>
          </table:table-cell>
          <table:table-cell calcext:value-type="time" office:string-value="10:00:00 AM" office:time-value="PT17H00M00S" office:value-type="string">
            <text:p>10:00:00 AM</text:p>
          </table:table-cell>
          <table:table-cell calcext:value-type="time" office:string-value="12:00:00 PM" office:time-value="PT20H00M00S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 table:style-name="ro1">
          <table:table-cell calcext:value-type="float" office:string-value="27" office:value="44" office:value-type="string">
            <text:p>27</text:p>
          </table:table-cell>
          <table:table-cell calcext:value-type="float" office:string-value="18" office:value="29" office:value-type="string">
            <text:p>18</text:p>
          </table:table-cell>
          <table:table-cell calcext:value-type="string" office:string-value="JUEVES" office:value-type="string">
            <text:p>JUEVES</text:p>
          </table:table-cell>
          <table:table-cell calcext:value-type="time" office:string-value="10:00:00 AM" office:time-value="PT18H00M00S" office:value-type="string">
            <text:p>10:00:00 AM</text:p>
          </table:table-cell>
          <table:table-cell calcext:value-type="time" office:string-value="12:00:00 PM" office:time-value="PT20H00M00S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 table:style-name="ro1">
          <table:table-cell calcext:value-type="float" office:string-value="28" office:value="45" office:value-type="string">
            <text:p>28</text:p>
          </table:table-cell>
          <table:table-cell calcext:value-type="float" office:string-value="18" office:value="30" office:value-type="string">
            <text:p>18</text:p>
          </table:table-cell>
          <table:table-cell calcext:value-type="string" office:string-value="VIERNES" office:value-type="string">
            <text:p>VIERNES</text:p>
          </table:table-cell>
          <table:table-cell calcext:value-type="time" office:string-value="08:00:00 AM" office:time-value="PT17H00M00S" office:value-type="string">
            <text:p>08:00:00 AM</text:p>
          </table:table-cell>
          <table:table-cell calcext:value-type="time" office:string-value="10:00:00 AM" office:time-value="PT21H00M00S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 table:style-name="ro1">
          <table:table-cell calcext:value-type="float" office:string-value="29" office:value="46" office:value-type="string">
            <text:p>29</text:p>
          </table:table-cell>
          <table:table-cell calcext:value-type="float" office:string-value="19" office:value="31" office:value-type="string">
            <text:p>19</text:p>
          </table:table-cell>
          <table:table-cell calcext:value-type="string" office:string-value="MARTES" office:value-type="string">
            <text:p>MARTES</text:p>
          </table:table-cell>
          <table:table-cell calcext:value-type="time" office:string-value="07:00:00 AM" office:time-value="PT08H00M00S" office:value-type="string">
            <text:p>07:00:00 AM</text:p>
          </table:table-cell>
          <table:table-cell calcext:value-type="time" office:string-value="10:00:00 AM" office:time-value="PT10H00M00S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 table:style-name="ro1">
          <table:table-cell calcext:value-type="float" office:string-value="30" office:value="47" office:value-type="string">
            <text:p>30</text:p>
          </table:table-cell>
          <table:table-cell calcext:value-type="float" office:string-value="20" office:value="31" office:value-type="string">
            <text:p>20</text:p>
          </table:table-cell>
          <table:table-cell calcext:value-type="string" office:string-value="MIERCOLES" office:value-type="string">
            <text:p>MIERCOLES</text:p>
          </table:table-cell>
          <table:table-cell calcext:value-type="time" office:string-value="05:00:00 PM" office:time-value="PT08H00M00S" office:value-type="string">
            <text:p>05:00:00 PM</text:p>
          </table:table-cell>
          <table:table-cell calcext:value-type="time" office:string-value="08:00:00 PM" office:time-value="PT10H00M00S" office:value-type="string">
            <text:p>08:00:00 PM</text:p>
          </table:table-cell>
          <table:table-cell calcext:value-type="string" office:string-value="D401" office:value-type="string">
            <text:p>D401</text:p>
          </table:table-cell>
        </table:table-row>
        <table:table-row table:style-name="ro1">
          <table:table-cell calcext:value-type="float" office:string-value="31" office:value="48" office:value-type="string">
            <text:p>31</text:p>
          </table:table-cell>
          <table:table-cell calcext:value-type="float" office:string-value="22" office:value="32" office:value-type="string">
            <text:p>22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05:00:00 PM" office:time-value="PT32H00M00S" office:value-type="string">
            <text:p>05:00:00 PM</text:p>
          </table:table-cell>
          <table:table-cell calcext:value-type="time" office:string-value="08:00:00 PM" office:time-value="PT34H00M00S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 table:style-name="ro1">
          <table:table-cell calcext:value-type="float" office:string-value="32" office:value="49" office:value-type="string">
            <text:p>32</text:p>
          </table:table-cell>
          <table:table-cell calcext:value-type="float" office:string-value="22" office:value="32" office:value-type="string">
            <text:p>22</text:p>
          </table:table-cell>
          <table:table-cell calcext:value-type="string" office:string-value="MIERCOLES" office:value-type="string">
            <text:p>MIERCOLES</text:p>
          </table:table-cell>
          <table:table-cell calcext:value-type="time" office:string-value="05:00:00 PM" office:time-value="PT56H00M00S" office:value-type="string">
            <text:p>05:00:00 PM</text:p>
          </table:table-cell>
          <table:table-cell calcext:value-type="time" office:string-value="08:00:00 PM" office:time-value="PT58H00M00S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 table:style-name="ro1">
          <table:table-cell calcext:value-type="float" office:string-value="33" office:value="50" office:value-type="string">
            <text:p>33</text:p>
          </table:table-cell>
          <table:table-cell calcext:value-type="float" office:string-value="21" office:value="33" office:value-type="string">
            <text:p>21</text:p>
          </table:table-cell>
          <table:table-cell calcext:value-type="string" office:string-value="MARTES" office:value-type="string">
            <text:p>MARTES</text:p>
          </table:table-cell>
          <table:table-cell calcext:value-type="time" office:string-value="05:00:00 PM" office:time-value="PT80H00M00S" office:value-type="string">
            <text:p>05:00:00 PM</text:p>
          </table:table-cell>
          <table:table-cell calcext:value-type="time" office:string-value="09:00:00 PM" office:time-value="PT11H00M00S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 table:style-name="ro1">
          <table:table-cell calcext:value-type="float" office:string-value="34" office:value="51" office:value-type="string">
            <text:p>34</text:p>
          </table:table-cell>
          <table:table-cell calcext:value-type="float" office:string-value="21" office:value="34" office:value-type="string">
            <text:p>21</text:p>
          </table:table-cell>
          <table:table-cell calcext:value-type="string" office:string-value="JUEVES" office:value-type="string">
            <text:p>JUEVES</text:p>
          </table:table-cell>
          <table:table-cell calcext:value-type="time" office:string-value="05:00:00 PM" office:time-value="PT10H00M00S" office:value-type="string">
            <text:p>05:00:00 PM</text:p>
          </table:table-cell>
          <table:table-cell calcext:value-type="time" office:string-value="08:00:00 PM" office:time-value="PT12H00M00S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 table:style-name="ro1">
          <table:table-cell calcext:value-type="float" office:string-value="35" office:value="52" office:value-type="string">
            <text:p>35</text:p>
          </table:table-cell>
          <table:table-cell calcext:value-type="float" office:string-value="24" office:value="35" office:value-type="string">
            <text:p>24</text:p>
          </table:table-cell>
          <table:table-cell calcext:value-type="string" office:string-value="VIERNES" office:value-type="string">
            <text:p>VIERNES</text:p>
          </table:table-cell>
          <table:table-cell calcext:value-type="time" office:string-value="05:00:00 PM" office:time-value="PT10H00M00S" office:value-type="string">
            <text:p>05:00:00 PM</text:p>
          </table:table-cell>
          <table:table-cell calcext:value-type="time" office:string-value="09:00:00 PM" office:time-value="PT12H00M00S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 table:style-name="ro1">
          <table:table-cell calcext:value-type="float" office:string-value="36" office:value="53" office:value-type="string">
            <text:p>36</text:p>
          </table:table-cell>
          <table:table-cell calcext:value-type="float" office:string-value="25" office:value="36" office:value-type="string">
            <text:p>25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07:00:00 PM" office:time-value="PT17H00M00S" office:value-type="string">
            <text:p>07:00:00 PM</text:p>
          </table:table-cell>
          <table:table-cell calcext:value-type="time" office:string-value="10:00:00 PM" office:time-value="PT20H00M00S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 table:style-name="ro1">
          <table:table-cell calcext:value-type="float" office:string-value="37" office:value="54" office:value-type="string">
            <text:p>37</text:p>
          </table:table-cell>
          <table:table-cell calcext:value-type="float" office:string-value="23" office:value="36" office:value-type="string">
            <text:p>23</text:p>
          </table:table-cell>
          <table:table-cell calcext:value-type="string" office:string-value="MIERCOLES" office:value-type="string">
            <text:p>MIERCOLES</text:p>
          </table:table-cell>
          <table:table-cell calcext:value-type="time" office:string-value="07:00:00 PM" office:time-value="PT19H00M00S" office:value-type="string">
            <text:p>07:00:00 PM</text:p>
          </table:table-cell>
          <table:table-cell calcext:value-type="time" office:string-value="10:00:00 PM" office:time-value="PT22H00M00S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 table:style-name="ro1">
          <table:table-cell calcext:value-type="float" office:string-value="38" office:value="55" office:value-type="string">
            <text:p>38</text:p>
          </table:table-cell>
          <table:table-cell calcext:value-type="float" office:string-value="26" office:value="37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05:00:00 PM" office:time-value="PT17H00M00S" office:value-type="string">
            <text:p>05:00:00 PM</text:p>
          </table:table-cell>
          <table:table-cell calcext:value-type="time" office:string-value="08:00:00 PM" office:time-value="PT20H00M00S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 table:style-name="ro1">
          <table:table-cell calcext:value-type="float" office:string-value="39" office:value="56" office:value-type="string">
            <text:p>39</text:p>
          </table:table-cell>
          <table:table-cell calcext:value-type="float" office:string-value="26" office:value="37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time" office:string-value="07:00:00 PM" office:time-value="PT19H00M00S" office:value-type="string">
            <text:p>07:00:00 PM</text:p>
          </table:table-cell>
          <table:table-cell calcext:value-type="time" office:string-value="10:00:00 PM" office:time-value="PT22H00M00S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 table:style-name="ro1">
          <table:table-cell calcext:value-type="float" office:string-value="40" office:value="57" office:value-type="string">
            <text:p>40</text:p>
          </table:table-cell>
          <table:table-cell calcext:value-type="float" office:string-value="27" office:value="38" office:value-type="string">
            <text:p>27</text:p>
          </table:table-cell>
          <table:table-cell calcext:value-type="string" office:string-value="JUEVES" office:value-type="string">
            <text:p>JUEVES</text:p>
          </table:table-cell>
          <table:table-cell calcext:value-type="time" office:string-value="05:00:00 PM" office:time-value="PT19H00M00S" office:value-type="string">
            <text:p>05:00:00 PM</text:p>
          </table:table-cell>
          <table:table-cell calcext:value-type="time" office:string-value="08:00:00 PM" office:time-value="PT22H00M00S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 table:style-name="ro1">
          <table:table-cell calcext:value-type="float" office:string-value="41" office:value="58" office:value-type="string">
            <text:p>41</text:p>
          </table:table-cell>
          <table:table-cell calcext:value-type="float" office:string-value="27" office:value="38" office:value-type="string">
            <text:p>27</text:p>
          </table:table-cell>
          <table:table-cell calcext:value-type="string" office:string-value="VIERNES" office:value-type="string">
            <text:p>VIERNES</text:p>
          </table:table-cell>
          <table:table-cell calcext:value-type="time" office:string-value="07:00:00 PM" office:time-value="PT17H00M00S" office:value-type="string">
            <text:p>07:00:00 PM</text:p>
          </table:table-cell>
          <table:table-cell calcext:value-type="time" office:string-value="10:00:00 PM" office:time-value="PT20H00M00S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 table:style-name="ro1">
          <table:table-cell calcext:value-type="float" office:string-value="42" office:value="59" office:value-type="string">
            <text:p>42</text:p>
          </table:table-cell>
          <table:table-cell calcext:value-type="float" office:string-value="28" office:value="39" office:value-type="string">
            <text:p>28</text:p>
          </table:table-cell>
          <table:table-cell calcext:value-type="string" office:string-value="JUEVES" office:value-type="string">
            <text:p>JUEVES</text:p>
          </table:table-cell>
          <table:table-cell calcext:value-type="time" office:string-value="07:00:00 PM" office:time-value="PT18H00M00S" office:value-type="string">
            <text:p>07:00:00 PM</text:p>
          </table:table-cell>
          <table:table-cell calcext:value-type="time" office:string-value="10:00:00 PM" office:time-value="PT20H00M00S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 table:style-name="ro1">
          <table:table-cell calcext:value-type="float" office:string-value="43" office:value="60" office:value-type="string">
            <text:p>43</text:p>
          </table:table-cell>
          <table:table-cell calcext:value-type="float" office:string-value="28" office:value="40" office:value-type="string">
            <text:p>28</text:p>
          </table:table-cell>
          <table:table-cell calcext:value-type="string" office:string-value="VIERNES" office:value-type="string">
            <text:p>VIERNES</text:p>
          </table:table-cell>
          <table:table-cell calcext:value-type="time" office:string-value="05:00:00 PM" office:time-value="PT17H00M00S" office:value-type="string">
            <text:p>05:00:00 PM</text:p>
          </table:table-cell>
          <table:table-cell calcext:value-type="time" office:string-value="08:00:00 PM" office:time-value="PT21H00M00S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</table:table>
      <table:table table:name="Teachers" table:style-name="ta1">
        <table:table-column table:default-cell-style-name="ce8" table:style-name="co1"/>
        <table:table-column table:default-cell-style-name="ce15" table:style-name="co11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 table:style-name="ce8">
            <text:p>name</text:p>
          </table:table-cell>
        </table:table-row>
        <table:table-row table:style-name="ro1">
          <table:table-cell calcext:value-type="float" office:string-value="11" office:value="1" office:value-type="string">
            <text:p>11</text:p>
          </table:table-cell>
          <table:table-cell calcext:value-type="string" office:string-value="Valentina Hernández" office:value-type="string" table:style-name="ce8">
            <text:p>Valentina Hernández</text:p>
          </table:table-cell>
        </table:table-row>
        <table:table-row table:style-name="ro1">
          <table:table-cell calcext:value-type="float" office:string-value="12" office:value="2" office:value-type="string">
            <text:p>12</text:p>
          </table:table-cell>
          <table:table-cell calcext:value-type="string" office:string-value="Daniel Torres" office:value-type="string" table:style-name="ce8">
            <text:p>Daniel Torres</text:p>
          </table:table-cell>
        </table:table-row>
        <table:table-row table:style-name="ro1">
          <table:table-cell calcext:value-type="float" office:string-value="13" office:value="3" office:value-type="string">
            <text:p>13</text:p>
          </table:table-cell>
          <table:table-cell calcext:value-type="string" office:string-value="Camila Ramírez" office:value-type="string" table:style-name="ce8">
            <text:p>Camila Ramírez</text:p>
          </table:table-cell>
        </table:table-row>
        <table:table-row table:style-name="ro1">
          <table:table-cell calcext:value-type="float" office:string-value="14" office:value="4" office:value-type="string">
            <text:p>14</text:p>
          </table:table-cell>
          <table:table-cell calcext:value-type="string" office:string-value="Sebastián Castro" office:value-type="string" table:style-name="ce8">
            <text:p>Sebastián Castro</text:p>
          </table:table-cell>
        </table:table-row>
        <table:table-row table:style-name="ro1">
          <table:table-cell calcext:value-type="float" office:string-value="15" office:value="5" office:value-type="string">
            <text:p>15</text:p>
          </table:table-cell>
          <table:table-cell calcext:value-type="string" office:string-value="Isabella Vargas" office:value-type="string" table:style-name="ce8">
            <text:p>Isabella Vargas</text:p>
          </table:table-cell>
        </table:table-row>
        <table:table-row table:style-name="ro1">
          <table:table-cell calcext:value-type="float" office:string-value="1" office:value="6" office:value-type="string">
            <text:p>1</text:p>
          </table:table-cell>
          <table:table-cell calcext:value-type="string" office:string-value="Carlos Gomez" office:value-type="string" table:style-name="ce11">
            <text:p>Carlos Gomez</text:p>
          </table:table-cell>
        </table:table-row>
        <table:table-row table:style-name="ro1">
          <table:table-cell calcext:value-type="float" office:string-value="2" office:value="7" office:value-type="string">
            <text:p>2</text:p>
          </table:table-cell>
          <table:table-cell calcext:value-type="string" office:string-value="Ana Rodriguez" office:value-type="string" table:style-name="ce11">
            <text:p>Ana Rodriguez</text:p>
          </table:table-cell>
        </table:table-row>
        <table:table-row table:style-name="ro1">
          <table:table-cell calcext:value-type="float" office:string-value="3" office:value="8" office:value-type="string">
            <text:p>3</text:p>
          </table:table-cell>
          <table:table-cell calcext:value-type="string" office:string-value="Luis Martinez" office:value-type="string">
            <text:p>Luis Martinez</text:p>
          </table:table-cell>
        </table:table-row>
        <table:table-row table:style-name="ro1">
          <table:table-cell calcext:value-type="float" office:string-value="4" office:value="9" office:value-type="string">
            <text:p>4</text:p>
          </table:table-cell>
          <table:table-cell calcext:value-type="string" office:string-value="Sandra Perez" office:value-type="string">
            <text:p>Sandra Perez</text:p>
          </table:table-cell>
        </table:table-row>
        <table:table-row table:style-name="ro1">
          <table:table-cell calcext:value-type="float" office:string-value="5" office:value="10" office:value-type="string">
            <text:p>5</text:p>
          </table:table-cell>
          <table:table-cell calcext:value-type="string" office:string-value="Diego Herrera" office:value-type="string">
            <text:p>Diego Herrera</text:p>
          </table:table-cell>
        </table:table-row>
        <table:table-row table:style-name="ro1">
          <table:table-cell calcext:value-type="float" office:string-value="6" office:value="11" office:value-type="string">
            <text:p>6</text:p>
          </table:table-cell>
          <table:table-cell calcext:value-type="string" office:string-value="Juan Pérez" office:value-type="string">
            <text:p>Juan Pérez</text:p>
          </table:table-cell>
        </table:table-row>
        <table:table-row table:style-name="ro1">
          <table:table-cell calcext:value-type="float" office:string-value="7" office:value="12" office:value-type="string">
            <text:p>7</text:p>
          </table:table-cell>
          <table:table-cell calcext:value-type="string" office:string-value="María González" office:value-type="string">
            <text:p>María González</text:p>
          </table:table-cell>
        </table:table-row>
        <table:table-row table:style-name="ro1">
          <table:table-cell calcext:value-type="float" office:string-value="8" office:value="13" office:value-type="string">
            <text:p>8</text:p>
          </table:table-cell>
          <table:table-cell calcext:value-type="string" office:string-value="Carlos Rodríguez" office:value-type="string">
            <text:p>Carlos Rodríguez</text:p>
          </table:table-cell>
        </table:table-row>
        <table:table-row table:style-name="ro1">
          <table:table-cell calcext:value-type="float" office:string-value="9" office:value="14" office:value-type="string">
            <text:p>9</text:p>
          </table:table-cell>
          <table:table-cell calcext:value-type="string" office:string-value="Sofía Martínez" office:value-type="string">
            <text:p>Sofía Martínez</text:p>
          </table:table-cell>
        </table:table-row>
        <table:table-row table:style-name="ro1">
          <table:table-cell calcext:value-type="float" office:string-value="10" office:value="15" office:value-type="string">
            <text:p>10</text:p>
          </table:table-cell>
          <table:table-cell calcext:value-type="string" office:string-value="Andrés López" office:value-type="string">
            <text:p>Andrés López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 table:style-name="ro1">
          <table:table-cell calcext:value-type="string" office:string-value="1" office:value-type="string">
            <text:p>1</text:p>
          </table:table-cell>
          <table:table-cell calcext:value-type="string" office:string-value="Juan" office:value-type="string">
            <text:p>Juan</text:p>
          </table:table-cell>
          <table:table-cell calcext:value-type="string" office:string-value="Pérez" office:value-type="string">
            <text:p>Pér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9" office:value-type="string">
            <text:p>123456789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uan.perez@email.com" office:value-type="string">
            <text:p>juan.perez@email.com</text:p>
          </table:table-cell>
          <table:table-cell calcext:value-type="string" office:string-value="$2a$10$wDxp0zf/UGZq8QfJxn4A1OPTSzy8OYDBhAS5q45fxQy.V1GjvOwSy" office:value-type="string">
            <text:p>$2a$10$wDxp0zf/UGZq8QfJxn4A1OPTSzy8OYDBhAS5q45fxQy.V1GjvOwSy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38:06.433237752" office:value-type="string">
            <text:p>2026-06-01T04:38:06.433237752</text:p>
          </table:table-cell>
        </table:table-row>
        <table:table-row table:style-name="ro1">
          <table:table-cell calcext:value-type="string" office:string-value="2" office:value-type="string">
            <text:p>2</text:p>
          </table:table-cell>
          <table:table-cell calcext:value-type="string" office:string-value="Ana" office:value-type="string">
            <text:p>Ana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6" office:value-type="string">
            <text:p>123456786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na.gomez@email.com" office:value-type="string">
            <text:p>ana.gomez@email.com</text:p>
          </table:table-cell>
          <table:table-cell calcext:value-type="string" office:string-value="$2a$10$qGimAV51KyRz0u9nayvHjeYSkdYrpHh117JFRE/r1w8AYhw9pvOum" office:value-type="string">
            <text:p>$2a$10$qGimAV51KyRz0u9nayvHjeYSkdYrpHh117JFRE/r1w8AYhw9pvOum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44:57.075978448" office:value-type="string">
            <text:p>2026-06-01T04:44:57.075978448</text:p>
          </table:table-cell>
        </table:table-row>
        <table:table-row table:style-name="ro1">
          <table:table-cell calcext:value-type="string" office:string-value="3" office:value-type="string">
            <text:p>3</text:p>
          </table:table-cell>
          <table:table-cell calcext:value-type="string" office:string-value="Joan" office:value-type="string">
            <text:p>Joan</text:p>
          </table:table-cell>
          <table:table-cell calcext:value-type="string" office:string-value="Vergara" office:value-type="string">
            <text:p>Vergar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90" office:value-type="string">
            <text:p>1234567890</text:p>
          </table:table-cell>
          <table:table-cell calcext:value-type="string" office:string-value="2003-05-15" office:value-type="string">
            <text:p>2003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rtagena, Bolívar" office:value-type="string">
            <text:p>Cartagena, Bolívar</text:p>
          </table:table-cell>
          <table:table-cell calcext:value-type="string" office:string-value="jvergarav3@gmail.com" office:value-type="string">
            <text:p>jvergarav3@gmail.com</text:p>
          </table:table-cell>
          <table:table-cell calcext:value-type="string" office:string-value="$2a$10$vL1In03Q4.S4vXq3y.pni.CjCbt29A.Vfm/t9kuprAbYSD2Sy51qS" office:value-type="string">
            <text:p>$2a$10$vL1In03Q4.S4vXq3y.pni.CjCbt29A.Vfm/t9kuprAbYSD2Sy51qS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7T14:40:40.573736806" office:value-type="string">
            <text:p>2026-06-07T14:40:40.573736806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</table:table-row>
        <table:table-row table:style-name="ro1">
          <table:table-cell calcext:value-type="string" office:string-value="1" office:value-type="string">
            <text:p>1</text:p>
          </table:table-cell>
          <table:table-cell calcext:value-type="string" office:string-value="56526302" office:value-type="string">
            <text:p>56526302</text:p>
          </table:table-cell>
          <table:table-cell calcext:value-type="string" office:string-value="1" office:value-type="string">
            <text:p>1</text:p>
          </table:table-cell>
        </table:table-row>
        <table:table-row table:style-name="ro1">
          <table:table-cell calcext:value-type="string" office:string-value="2" office:value-type="string">
            <text:p>2</text:p>
          </table:table-cell>
          <table:table-cell calcext:value-type="string" office:string-value="33054516" office:value-type="string">
            <text:p>33054516</text:p>
          </table:table-cell>
          <table:table-cell calcext:value-type="string" office:string-value="2" office:value-type="string">
            <text:p>2</text:p>
          </table:table-cell>
        </table:table-row>
        <table:table-row table:style-name="ro1">
          <table:table-cell calcext:value-type="string" office:string-value="3" office:value-type="string">
            <text:p>3</text:p>
          </table:table-cell>
          <table:table-cell calcext:value-type="string" office:string-value="75997562" office:value-type="string">
            <text:p>75997562</text:p>
          </table:table-cell>
          <table:table-cell calcext:value-type="string" office:string-value="3" office:value-type="string">
            <text:p>3</text:p>
          </table:table-cell>
        </table:table-row>
      </table:table>
      <table:table table:name="Enrollments" table:style-name="ta1">
        <table:table-column table:default-cell-style-name="Default" table:number-columns-repeated="4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</table:table-row>
        <table:table-row table:style-name="ro1"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</table:table-row>
        <table:table-row table:style-name="ro1"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</table:table-row>
        <table:table-row table:style-name="ro1">
          <table:table-cell calcext:value-type="string" office:string-value="3" office:value-type="string">
            <text:p>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7" office:value-type="string">
            <text:p>2026-06-07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 table:style-name="ro1">
          <table:table-cell calcext:value-type="float" office:string-value="11" office:value="1" office:value-type="string">
            <text:p>1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  <table:table-row table:style-name="ro1">
          <table:table-cell calcext:value-type="float" office:string-value="12" office:value="2" office:value-type="string">
            <text:p>1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  <table:table-row table:style-name="ro1">
          <table:table-cell calcext:value-type="float" office:string-value="13" office:value="3" office:value-type="string">
            <text:p>1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  <table:table-row table:style-name="ro1">
          <table:table-cell calcext:value-type="float" office:string-value="14" office:value="4" office:value-type="string">
            <text:p>1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  <table:table-row table:style-name="ro1">
          <table:table-cell calcext:value-type="float" office:string-value="15" office:value="5" office:value-type="string">
            <text:p>1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  <table:table-row table:style-name="ro1">
          <table:table-cell calcext:value-type="float" office:string-value="1" office:value="6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  <table:table-row table:style-name="ro1">
          <table:table-cell calcext:value-type="float" office:string-value="2" office:value="7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  <table:table-row table:style-name="ro1">
          <table:table-cell calcext:value-type="float" office:string-value="3" office:value="8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  <table:table-row table:style-name="ro1">
          <table:table-cell calcext:value-type="float" office:string-value="4" office:value="9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  <table:table-row table:style-name="ro1">
          <table:table-cell calcext:value-type="float" office:string-value="5" office:value="10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  <table:table-row table:style-name="ro1"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  <table:table-row table:style-name="ro1"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  <table:table-row table:style-name="ro1"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  <table:table-row table:style-name="ro1"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  <table:table-row table:style-name="ro1"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string-value="0.0" office:value="0" office:value-type="string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ystem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font-pitch="variable" style:name="Nimbus Sans" svg:font-family="'Nimbus Sans'"/>
    <style:font-face style:font-family-generic="system" style:font-pitch="variable" style:name="Noto Sans Arabic" svg:font-family="'Noto Sans Arabic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size="12pt" fo:language="en" loext:opacity="0%" style:country-asian="CN" style:country-complex="IN" style:font-family-complex="'Noto Sans'" style:font-family-generic-complex="system" style:font-name="Liberation Serif" style:font-name-asian="DejaVu Sans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 style:data-style-name="N2" text:time-value="23:23:35.3904644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07T23:42:19.172935563</dc:date>
    <meta:editing-duration>PT13H8M37S</meta:editing-duration>
    <meta:editing-cycles>24</meta:editing-cycles>
    <meta:document-statistic meta:table-count="14" meta:cell-count="1130" meta:object-count="0"/>
  </office:meta>
</office:document-meta>
</file>