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family="table-cell" style:name="ce6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7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8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0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ADMI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TEACHER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4</text:p>
          </table:table-cell>
          <table:table-cell calcext:value-type="string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6" table:style-name="co2"/>
        <table:table-column table:default-cell-style-name="ce6" table:style-name="co3"/>
        <table:table-column table:default-cell-style-name="ce6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Ingenieria de Sistemas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Ingenieria de Software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Ingenieria Civil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Ingenieria de Alimentos</text:p>
          </table:table-cell>
          <table:table-cell calcext:value-type="float" office:value="10" office:value-type="float">
            <text:p>10</text:p>
          </table:table-cell>
        </table:table-row>
      </table:table>
      <table:table table:name="SemesterTemplate" table:style-name="ta1">
        <table:table-column table:default-cell-style-name="ce6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 table:number-columns-repeated="2">
            <text:p>1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</table:table>
      <table:table table:name="SemesterTemplateDetails" table:style-name="ta1">
        <table:table-column table:default-cell-style-name="ce6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 table:style-name="ro1">
          <table:table-cell calcext:value-type="float" office:value="1" office:value-type="float" table:number-columns-repeated="3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>
            <text:p>1</text:p>
          </table:table-cell>
          <table:table-cell calcext:value-type="float" office:value="5" office:value-type="float">
            <text:p>5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2" office:value-type="float">
            <text:p>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2" office:value-type="float">
            <text:p>2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" office:value-type="float">
            <text:p>2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3" office:value-type="float">
            <text:p>3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3" office:value-type="float">
            <text:p>3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3" office:value-type="float">
            <text:p>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3" office:value-type="float">
            <text:p>3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4" office:value-type="float">
            <text:p>4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4" office:value-type="float">
            <text:p>4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4" office:value-type="float">
            <text:p>4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4" office:value-type="float">
            <text:p>4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4" office:value-type="float">
            <text:p>4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5" office:value-type="float">
            <text:p>5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5" office:value-type="float">
            <text:p>5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26" office:value-type="float">
            <text:p>26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6" office:value-type="float">
            <text:p>6</text:p>
          </table:table-cell>
          <table:table-cell calcext:value-type="float" office:value="27" office:value-type="float">
            <text:p>27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6" office:value-type="float">
            <text:p>6</text:p>
          </table:table-cell>
          <table:table-cell calcext:value-type="float" office:value="28" office:value-type="float">
            <text:p>28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6" office:value-type="float">
            <text:p>6</text:p>
          </table:table-cell>
          <table:table-cell calcext:value-type="float" office:value="29" office:value-type="float">
            <text:p>29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6" office:value-type="float">
            <text:p>6</text:p>
          </table:table-cell>
          <table:table-cell calcext:value-type="float" office:value="30" office:value-type="float">
            <text:p>30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7" office:value-type="float">
            <text:p>7</text:p>
          </table:table-cell>
          <table:table-cell calcext:value-type="float" office:value="31" office:value-type="float">
            <text:p>3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7" office:value-type="float">
            <text:p>7</text:p>
          </table:table-cell>
          <table:table-cell calcext:value-type="float" office:value="32" office:value-type="float">
            <text:p>32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7" office:value-type="float">
            <text:p>7</text:p>
          </table:table-cell>
          <table:table-cell calcext:value-type="float" office:value="33" office:value-type="float">
            <text:p>33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7" office:value-type="float">
            <text:p>7</text:p>
          </table:table-cell>
          <table:table-cell calcext:value-type="float" office:value="34" office:value-type="float">
            <text:p>34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7" office:value-type="float">
            <text:p>7</text:p>
          </table:table-cell>
          <table:table-cell calcext:value-type="float" office:value="35" office:value-type="float">
            <text:p>35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8" office:value-type="float">
            <text:p>8</text:p>
          </table:table-cell>
          <table:table-cell calcext:value-type="float" office:value="36" office:value-type="float">
            <text:p>36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8" office:value-type="float">
            <text:p>8</text:p>
          </table:table-cell>
          <table:table-cell calcext:value-type="float" office:value="37" office:value-type="float">
            <text:p>37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8" office:value-type="float">
            <text:p>8</text:p>
          </table:table-cell>
          <table:table-cell calcext:value-type="float" office:value="38" office:value-type="float">
            <text:p>38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8" office:value-type="float">
            <text:p>8</text:p>
          </table:table-cell>
          <table:table-cell calcext:value-type="float" office:value="39" office:value-type="float">
            <text:p>39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8" office:value-type="float">
            <text:p>8</text:p>
          </table:table-cell>
          <table:table-cell calcext:value-type="float" office:value="40" office:value-type="float">
            <text:p>40</text:p>
          </table:table-cell>
        </table:table-row>
      </table:table>
      <table:table table:name="Prerequisite" table:style-name="ta1">
        <table:table-column table:default-cell-style-name="ce6" table:style-name="co1"/>
        <table:table-column table:default-cell-style-name="ce6" table:style-name="co5"/>
        <table:table-column table:default-cell-style-name="ce6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6" office:value-type="float">
            <text:p>16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7" office:value-type="float">
            <text:p>17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8" office:value-type="float">
            <text:p>18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19" office:value-type="float">
            <text:p>19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0" office:value-type="float">
            <text:p>20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21" office:value-type="float">
            <text:p>2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22" office:value-type="float">
            <text:p>22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23" office:value-type="float">
            <text:p>23</text:p>
          </table:table-cell>
          <table:table-cell calcext:value-type="float" office:value="2" office:value-type="float">
            <text:p>2</text:p>
          </table:table-cell>
        </table:table-row>
      </table:table>
      <table:table table:name="Course" table:style-name="ta1">
        <table:table-column table:default-cell-style-name="ce6" table:style-name="co1"/>
        <table:table-column table:default-cell-style-name="ce6" table:style-name="co7"/>
        <table:table-column table:default-cell-style-name="ce6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/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FUNDAMENTOS DE PROGRAMACION</text:p>
          </table:table-cell>
          <table:table-cell calcext:value-type="string" office:value-type="string">
            <text:p>FPR1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MATEMATICAS BASICAS</text:p>
          </table:table-cell>
          <table:table-cell calcext:value-type="string" office:value-type="string">
            <text:p>MAT1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LOGICA COMPUTACIONAL</text:p>
          </table:table-cell>
          <table:table-cell calcext:value-type="string" office:value-type="string">
            <text:p>LOG204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COMPETENCIAS COMUNICATIVAS</text:p>
          </table:table-cell>
          <table:table-cell calcext:value-type="string" office:value-type="string">
            <text:p>COM102</text:p>
          </table:table-cell>
          <table:table-cell calcext:value-type="float" office:value="2" office:value-type="float">
            <text:p>2</text:p>
          </table:table-cell>
          <table:table-cell/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>
            <text:p>INTRODUCCION A LA INGENIERIA</text:p>
          </table:table-cell>
          <table:table-cell calcext:value-type="string" office:value-type="string">
            <text:p>ING202</text:p>
          </table:table-cell>
          <table:table-cell calcext:value-type="float" office:value="2" office:value-type="float">
            <text:p>2</text:p>
          </table:table-cell>
          <table:table-cell/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>
            <text:p>PROGRAMACION ORIENTADA A OBJETOS</text:p>
          </table:table-cell>
          <table:table-cell calcext:value-type="string" office:value-type="string">
            <text:p>POO2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>
            <text:p>CALCULO I</text:p>
          </table:table-cell>
          <table:table-cell calcext:value-type="string" office:value-type="string">
            <text:p>CAL2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ARQUITCTURA DE COMPUTADORES</text:p>
          </table:table-cell>
          <table:table-cell calcext:value-type="string" office:value-type="string">
            <text:p>ARG2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INGLES I</text:p>
          </table:table-cell>
          <table:table-cell calcext:value-type="string" office:value-type="string">
            <text:p>ENG201</text:p>
          </table:table-cell>
          <table:table-cell calcext:value-type="float" office:value="2" office:value-type="float">
            <text:p>2</text:p>
          </table:table-cell>
          <table:table-cell/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METODOLOGIAS DEL DESARROLLO</text:p>
          </table:table-cell>
          <table:table-cell calcext:value-type="string" office:value-type="string">
            <text:p>MET201</text:p>
          </table:table-cell>
          <table:table-cell calcext:value-type="float" office:value="2" office:value-type="float">
            <text:p>2</text:p>
          </table:table-cell>
          <table:table-cell/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ESTRUCTURA DE DATOS</text:p>
          </table:table-cell>
          <table:table-cell calcext:value-type="string" office:value-type="string">
            <text:p>EDA3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BASES DE DATOS I</text:p>
          </table:table-cell>
          <table:table-cell calcext:value-type="string" office:value-type="string">
            <text:p>BDD3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INGENIERIA DE REQUISITOS</text:p>
          </table:table-cell>
          <table:table-cell calcext:value-type="string" office:value-type="string">
            <text:p>REQ3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INGLES II</text:p>
          </table:table-cell>
          <table:table-cell calcext:value-type="string" office:value-type="string">
            <text:p>ENG301</text:p>
          </table:table-cell>
          <table:table-cell calcext:value-type="float" office:value="2" office:value-type="float">
            <text:p>2</text:p>
          </table:table-cell>
          <table:table-cell/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ESTADISTICA</text:p>
          </table:table-cell>
          <table:table-cell calcext:value-type="string" office:value-type="string">
            <text:p>EST3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string" office:value-type="string">
            <text:p>INGENIERIA DE SOFTWARE I</text:p>
          </table:table-cell>
          <table:table-cell calcext:value-type="string" office:value-type="string">
            <text:p>ISW4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string" office:value-type="string">
            <text:p>BASES DE DATOS II</text:p>
          </table:table-cell>
          <table:table-cell calcext:value-type="string" office:value-type="string">
            <text:p>BDD4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string" office:value-type="string">
            <text:p>SISTEMAS OPERATIVOS</text:p>
          </table:table-cell>
          <table:table-cell calcext:value-type="string" office:value-type="string">
            <text:p>SO401</text:p>
          </table:table-cell>
          <table:table-cell calcext:value-type="float" office:value="4" office:value-type="float">
            <text:p>4</text:p>
          </table:table-cell>
          <table:table-cell/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string" office:value-type="string">
            <text:p>DISEÑO DE SOFTWARE</text:p>
          </table:table-cell>
          <table:table-cell calcext:value-type="string" office:value-type="string">
            <text:p>DSW4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string" office:value-type="string">
            <text:p>REDES DE COMPUTADORES</text:p>
          </table:table-cell>
          <table:table-cell calcext:value-type="string" office:value-type="string">
            <text:p>RED4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string" office:value-type="string">
            <text:p>FISICA I</text:p>
          </table:table-cell>
          <table:table-cell calcext:value-type="string" office:value-type="string">
            <text:p>FSC5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string" office:value-type="string">
            <text:p>FISICA II</text:p>
          </table:table-cell>
          <table:table-cell calcext:value-type="string" office:value-type="string">
            <text:p>FSC601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string" office:value-type="string" table:style-name="ce7">
            <text:p>ALGEBRA LINEAL</text:p>
          </table:table-cell>
          <table:table-cell calcext:value-type="string" office:value-type="string">
            <text:p>ALG302</text:p>
          </table:table-cell>
          <table:table-cell calcext:value-type="float" office:value="3" office:value-type="float">
            <text:p>3</text:p>
          </table:table-cell>
          <table:table-cell/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string" office:value-type="string">
            <text:p>CALCULO II</text:p>
          </table:table-cell>
          <table:table-cell calcext:value-type="string" office:value-type="string">
            <text:p>CAL301</text:p>
          </table:table-cell>
          <table:table-cell calcext:value-type="float" office:value="4" office:value-type="float">
            <text:p>4</text:p>
          </table:table-cell>
          <table:table-cell/>
        </table:table-row>
      </table:table>
      <table:table table:name="Group" table:style-name="ta1">
        <table:table-column table:default-cell-style-name="ce6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FPR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  <table:table-cell calcext:value-type="string" office:value-type="string">
            <text:p>MAT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" office:value-type="float" table:number-columns-repeated="2">
            <text:p>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LOG204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" office:value-type="float" table:number-columns-repeated="3">
            <text:p>4</text:p>
          </table:table-cell>
          <table:table-cell calcext:value-type="string" office:value-type="string">
            <text:p>COM102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5" office:value-type="float" table:number-columns-repeated="2">
            <text:p>5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ING202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6" office:value-type="float" table:number-columns-repeated="2">
            <text:p>6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POO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7" office:value-type="float" table:number-columns-repeated="2">
            <text:p>7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CAL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8" office:value-type="float" table:number-columns-repeated="2">
            <text:p>8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AR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9" office:value-type="float" table:number-columns-repeated="2">
            <text:p>9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ENG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0" office:value-type="float" table:number-columns-repeated="2">
            <text:p>10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ET2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1" office:value-type="float" table:number-columns-repeated="2">
            <text:p>11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DA3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2" office:value-type="float" table:number-columns-repeated="2">
            <text:p>1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BDD301-G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3" office:value-type="float" table:number-columns-repeated="2">
            <text:p>13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REQ301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4" office:value-type="float" table:number-columns-repeated="2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ENG3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5" office:value-type="float" table:number-columns-repeated="2">
            <text:p>15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ST3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6" office:value-type="float" table:number-columns-repeated="2">
            <text:p>1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ISW4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7" office:value-type="float" table:number-columns-repeated="2">
            <text:p>17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4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8" office:value-type="float" table:number-columns-repeated="2">
            <text:p>18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SO4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9" office:value-type="float" table:number-columns-repeated="2">
            <text:p>1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D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0" office:value-type="float" table:number-columns-repeated="2">
            <text:p>2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RED401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" office:value-type="float">
            <text:p>1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FPR1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T1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3" office:value-type="float">
            <text:p>3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LOG204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4" office:value-type="float">
            <text:p>4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COM1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ING202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POO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CAL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ALG3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21" office:value-type="float">
            <text:p>2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FSC5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9" office:value-type="float">
            <text:p>9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EN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11" office:value-type="float">
            <text:p>1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DA301-E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4" office:value-type="float">
            <text:p>2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CAL301-R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12" office:value-type="float">
            <text:p>12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301-O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FSC601-G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14" office:value-type="float">
            <text:p>14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NG301-L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17" office:value-type="float">
            <text:p>17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BDD401-K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18" office:value-type="float">
            <text:p>18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SO401-LM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EST301-Z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I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0" office:value-type="float">
            <text:p>20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RED401-V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default-cell-style-name="ce6" table:style-name="co9"/>
        <table:table-column table:default-cell-style-name="ce6" table:number-columns-repeated="2" table:style-name="co1"/>
        <table:table-column table:default-cell-style-name="ce8" table:style-name="co10"/>
        <table:table-column table:default-cell-style-name="ce8" table:style-name="co4"/>
        <table:table-column table:default-cell-style-name="ce6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 table:style-name="ce6">
            <text:p>startTime</text:p>
          </table:table-cell>
          <table:table-cell calcext:value-type="string" office:value-type="string" table:style-name="ce6">
            <text:p>endTime</text:p>
          </table:table-cell>
          <table:table-cell calcext:value-type="string" office:value-type="string">
            <text:p>classroom</text:p>
          </table:table-cell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13" office:value-type="float">
            <text:p>1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19" office:value-type="float">
            <text:p>1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20" office:value-type="float">
            <text:p>2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MART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24" office:value-type="float">
            <text:p>24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25" office:value-type="float">
            <text:p>25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23" office:value-type="float">
            <text:p>23</text:p>
          </table:table-cell>
          <table:table-cell calcext:value-type="string" office:value-type="string">
            <text:p>MIERCOL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1" office:value-type="float">
            <text:p>41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2" office:value-type="float">
            <text:p>42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3" office:value-type="float">
            <text:p>43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4" office:value-type="float">
            <text:p>44</text:p>
          </table:table-cell>
          <table:table-cell calcext:value-type="float" office:value="29" office:value-type="float">
            <text:p>2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5" office:value-type="float">
            <text:p>45</text:p>
          </table:table-cell>
          <table:table-cell calcext:value-type="float" office:value="30" office:value-type="float">
            <text:p>3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6" office:value-type="float">
            <text:p>46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7" office:value-type="float">
            <text:p>47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8" office:value-type="float">
            <text:p>48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9" office:value-type="float">
            <text:p>49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0" office:value-type="float">
            <text:p>50</text:p>
          </table:table-cell>
          <table:table-cell calcext:value-type="float" office:value="33" office:value-type="float">
            <text:p>3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1" office:value-type="float">
            <text:p>51</text:p>
          </table:table-cell>
          <table:table-cell calcext:value-type="float" office:value="34" office:value-type="float">
            <text:p>3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2" office:value-type="float">
            <text:p>52</text:p>
          </table:table-cell>
          <table:table-cell calcext:value-type="float" office:value="35" office:value-type="float">
            <text:p>3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3" office:value-type="float">
            <text:p>53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4" office:value-type="float">
            <text:p>54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5" office:value-type="float">
            <text:p>55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6" office:value-type="float">
            <text:p>56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7" office:value-type="float">
            <text:p>57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8" office:value-type="float">
            <text:p>58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9" office:value-type="float">
            <text:p>59</text:p>
          </table:table-cell>
          <table:table-cell calcext:value-type="float" office:value="39" office:value-type="float">
            <text:p>3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60" office:value-type="float">
            <text:p>60</text:p>
          </table:table-cell>
          <table:table-cell calcext:value-type="float" office:value="40" office:value-type="float">
            <text:p>4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401</text:p>
          </table:table-cell>
        </table:table-row>
      </table:table>
      <table:table table:name="Teachers" table:style-name="ta1">
        <table:table-column table:default-cell-style-name="ce6" table:style-name="co1"/>
        <table:table-column table:default-cell-style-name="ce10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 table:style-name="ce6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 table:style-name="ce6">
            <text:p>Carlos Gomez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 table:style-name="ce6">
            <text:p>Ana Rodriguez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 table:style-name="ce6">
            <text:p>Luis Martinez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 table:style-name="ce6">
            <text:p>Sandra Perez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 table:style-name="ce6">
            <text:p>Diego Herrera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 table:style-name="ce9">
            <text:p>Juan Pérez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 table:style-name="ce9">
            <text:p>María González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Carlos Rodríguez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Sofía Martínez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Andrés López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Valentina Hernández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Daniel Torres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Camila Ramírez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Sebastián Castro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Isabella Vargas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</table:table-row>
      </table:table>
      <table:table table:name="Enrollments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  <table:table-row>
          <table:table-cell calcext:value-type="string" office:string-value="" office:value-type="string">
            <text:p/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value="0.0" office:value-type="float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size="12pt" fo:language="en" loext:opacity="0%" style:country-asian="CN" style:country-complex="IN" style:font-family-complex="'Noto Sans'" style:font-family-generic-complex="system" style:font-name="Liberation Serif" style:font-name-asian="DejaVu Sans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03:35:15.321706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1T04:37:41.863558204</dc:date>
    <meta:editing-duration>PT8H3M28S</meta:editing-duration>
    <meta:editing-cycles>20</meta:editing-cycles>
    <meta:document-statistic meta:table-count="14" meta:cell-count="950" meta:object-count="0"/>
  </office:meta>
</office:document-meta>
</file>